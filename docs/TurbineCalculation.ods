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style:use-window-font-color="true"/>
    </style:style>
    <style:style style:name="ce21" style:family="table-cell" style:parent-style-name="Default" style:data-style-name="N131">
      <style:text-properties fo:color="#ff0000" fo:font-weight="bold" style:font-weight-asian="bold" style:font-weight-complex="bold"/>
    </style:style>
    <style:style style:name="ce19" style:family="table-cell" style:parent-style-name="Default">
      <style:text-properties style:use-window-font-color="true" fo:font-weight="bold" style:font-weight-asian="bold" style:font-weight-complex="bold"/>
    </style:style>
    <style:style style:name="ce4" style:family="table-cell" style:parent-style-name="Default" style:data-style-name="N2"/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Mono" style:font-name-asian="Liberation Mono" style:font-name-complex="Liberation Mono"/>
    </style:style>
    <style:style style:name="ce2" style:family="table-cell" style:parent-style-name="Default" style:data-style-name="N3"/>
    <style:style style:name="ce7" style:family="table-cell" style:parent-style-name="Default" style:data-style-name="N129"/>
    <style:style style:name="ce8" style:family="table-cell" style:parent-style-name="Default">
      <style:text-properties fo:color="#1e6a39"/>
    </style:style>
    <style:style style:name="ce13" style:family="table-cell" style:parent-style-name="Default" style:data-style-name="N1">
      <style:text-properties fo:color="#1e6a39" style:font-name="Liberation Mono" style:font-name-asian="Liberation Mono" style:font-name-complex="Liberation Mono"/>
    </style:style>
    <style:style style:name="ce34" style:family="table-cell" style:parent-style-name="Default" style:data-style-name="N2">
      <style:text-properties fo:color="#ff0000" fo:font-weight="bold" style:font-weight-asian="bold" style:font-weight-complex="bold"/>
    </style:style>
    <style:style style:name="ce23" style:family="table-cell" style:parent-style-name="Default" style:data-style-name="N3">
      <style:text-properties fo:color="#1e6a39" style:font-name="Liberation Mono" style:font-name-asian="Liberation Mono" style:font-name-complex="Liberation Mono"/>
    </style:style>
    <style:style style:name="ce11" style:family="table-cell" style:parent-style-name="Default" style:data-style-name="N1"/>
    <style:style style:name="ce30" style:family="table-cell" style:parent-style-name="Default">
      <style:text-properties fo:color="#1e6a39" fo:font-weight="bold" style:font-weight-asian="bold" style:font-weight-complex="bold"/>
    </style:style>
    <style:style style:name="ce31" style:family="table-cell" style:parent-style-name="Default">
      <style:text-properties fo:color="#1e6a39" style:font-name="Liberation Mono" fo:font-weight="bold" style:font-name-asian="Liberation Mono" style:font-weight-asian="bold" style:font-name-complex="Liberation Mono" style:font-weight-complex="bold"/>
    </style:style>
    <style:style style:name="ce12" style:family="table-cell" style:parent-style-name="Default">
      <style:text-properties fo:color="#666666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">
      <style:text-properties style:font-name="Liberation Mono" style:font-name-asian="Liberation Mono" style:font-name-complex="Liberation Mono"/>
    </style:style>
    <style:style style:name="ce43" style:family="table-cell" style:parent-style-name="Default" style:data-style-name="N2">
      <style:text-properties fo:color="#55308d" fo:font-weight="bold" style:font-weight-asian="bold" style:font-weight-complex="bold"/>
    </style:style>
    <style:style style:name="ce15" style:family="table-cell" style:parent-style-name="Default" style:data-style-name="N3">
      <style:text-properties style:font-name="Liberation Mono" style:font-name-asian="Liberation Mono" style:font-name-complex="Liberation Mono"/>
    </style:style>
    <style:style style:name="ce36" style:family="table-cell" style:parent-style-name="Default" style:data-style-name="N130"/>
    <style:style style:name="ce46" style:family="table-cell" style:parent-style-name="Default" style:data-style-name="N130">
      <style:text-properties fo:color="#55308d"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2"/>
        <table:table-column table:style-name="co1" table:number-columns-repeated="16372" table:default-cell-style-name="Default"/>
        <table:table-row table:style-name="ro1">
          <table:table-cell/>
          <table:table-cell table:style-name="ce1" office:value-type="string" calcext:value-type="string">
            <text:p>Full Load Design Specifications</text:p>
          </table:table-cell>
          <table:table-cell table:style-name="Default" table:number-columns-repeated="2"/>
          <table:table-cell table:style-name="ce3" office:value-type="string" calcext:value-type="string">
            <text:p>Red: Define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t_Sat(p)</text:p>
          </table:table-cell>
          <table:table-cell table:style-name="Default" office:value-type="string" calcext:value-type="string">
            <text:p>t_Design</text:p>
          </table:table-cell>
          <table:table-cell office:value-type="string" calcext:value-type="string">
            <text:p>h</text:p>
          </table:table-cell>
          <table:table-cell table:style-name="Default" office:value-type="string" calcext:value-type="string">
            <text:p>X</text:p>
          </table:table-cell>
          <table:table-cell table:style-name="ce8" office:value-type="string" calcext:value-type="string">
            <text:p>Entropy</text:p>
          </table:table-cell>
          <table:table-cell table:style-name="ce8" office:value-type="string" calcext:value-type="string">
            <text:p>h_2s</text:p>
          </table:table-cell>
          <table:table-cell table:style-name="ce30" office:value-type="string" calcext:value-type="string">
            <text:p>k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Pressure Drop Factor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rum Out</text:p>
          </table:table-cell>
          <table:table-cell table:style-name="ce3" office:value-type="float" office:value="65" calcext:value-type="float">
            <text:p>65</text:p>
          </table:table-cell>
          <table:table-cell table:formula="of:=SQRT(SQRT([.B3]))*100" office:value-type="float" office:value="283.941151443368" calcext:value-type="float">
            <text:p>283.94</text:p>
          </table:table-cell>
          <table:table-cell table:style-name="ce4" office:value-type="float" office:value="284" calcext:value-type="float">
            <text:p>284.00</text:p>
          </table:table-cell>
          <table:table-cell table:style-name="ce2" table:formula="of:=([.D3]+273.15)*4200+2100000" office:value-type="float" office:value="4440030" calcext:value-type="float">
            <text:p>4,440,030</text:p>
          </table:table-cell>
          <table:table-cell table:style-name="Default" office:value-type="float" office:value="1" calcext:value-type="float">
            <text:p>1</text:p>
          </table:table-cell>
          <table:table-cell table:style-name="ce13" table:formula="of:=IF([.F3]&lt;=0; 4200*LN(([.D3]+273.15)/273.15); IF([.F3]&lt;1; 4200*LN(([.C3]+273.15)/273.15) + [.F3]*(2100000/([.C3]+273.15)); 4200*LN(([.C3]+273.15)/273.15) + (2100000/([.C3]+273.15)) + 4200*LN(([.D3]+273.15)/([.C3]+273.15))))" office:value-type="float" office:value="6763.39692187765" calcext:value-type="float">
            <text:p>6763</text:p>
          </table:table-cell>
          <table:table-cell table:style-name="ce23"/>
          <table:table-cell table:style-name="ce30"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office:value-type="string" calcext:value-type="string">
            <text:p>HP In</text:p>
          </table:table-cell>
          <table:table-cell table:style-name="ce3" office:value-type="float" office:value="65" calcext:value-type="float">
            <text:p>65</text:p>
          </table:table-cell>
          <table:table-cell table:formula="of:=SQRT(SQRT([.B4]))*100" office:value-type="float" office:value="283.941151443368" calcext:value-type="float">
            <text:p>283.94</text:p>
          </table:table-cell>
          <table:table-cell table:style-name="ce4" office:value-type="float" office:value="284" calcext:value-type="float">
            <text:p>284.00</text:p>
          </table:table-cell>
          <table:table-cell table:style-name="ce2" table:formula="of:=([.D4]+273.15)*4200+2100000" office:value-type="float" office:value="4440030" calcext:value-type="float">
            <text:p>4,440,030</text:p>
          </table:table-cell>
          <table:table-cell table:style-name="Default" office:value-type="float" office:value="1" calcext:value-type="float">
            <text:p>1</text:p>
          </table:table-cell>
          <table:table-cell table:style-name="ce13" table:formula="of:=IF([.F4]&lt;=0; 4200*LN(([.D4]+273.15)/273.15); IF([.F4]&lt;1; 4200*LN(([.C4]+273.15)/273.15) + [.F4]*(2100000/([.C4]+273.15)); 4200*LN(([.C4]+273.15)/273.15) + (2100000/([.C4]+273.15)) + 4200*LN(([.D4]+273.15)/([.C4]+273.15))))" office:value-type="float" office:value="6763.39692187765" calcext:value-type="float">
            <text:p>6763</text:p>
          </table:table-cell>
          <table:table-cell table:style-name="ce23" table:formula="of:=IF([.G3] &lt;= 4200*LN(([.C4]+273.15)/273.15); 4200 * 273.15 * EXP([.G3] / 4200); IF([.G3] &gt;= 4200*LN(([.C4]+273.15)/273.15) + (2100000/([.C4]+273.15)); 4200 * ([.C4]+273.15) * EXP(([.G3] - 4200*LN(([.C4]+273.15)/273.15) - 2100000/([.C4]+273.15)) / 4200) + 2100000; 4200*([.C4]+273.15) + ([.G3] - 4200*LN(([.C4]+273.15)/273.15)) * ([.C4]+273.15)))" office:value-type="float" office:value="4440030" calcext:value-type="float">
            <text:p>4,440,030</text:p>
          </table:table-cell>
          <table:table-cell table:style-name="ce31"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office:value-type="string" calcext:value-type="string">
            <text:p>HP Mid</text:p>
          </table:table-cell>
          <table:table-cell office:value-type="float" office:value="10.5" calcext:value-type="float">
            <text:p>10.5</text:p>
          </table:table-cell>
          <table:table-cell table:formula="of:=SQRT(SQRT([.B5]))*100" office:value-type="float" office:value="180.010287183925" calcext:value-type="float">
            <text:p>180.01</text:p>
          </table:table-cell>
          <table:table-cell table:style-name="ce4" office:value-type="float" office:value="180" calcext:value-type="float">
            <text:p>180.00</text:p>
          </table:table-cell>
          <table:table-cell table:style-name="ce2" table:formula="of:=([.D5]+273.15)*4200+2100000" office:value-type="float" office:value="4003230" calcext:value-type="float">
            <text:p>4,003,230</text:p>
          </table:table-cell>
          <table:table-cell table:style-name="Default" office:value-type="float" office:value="1" calcext:value-type="float">
            <text:p>1</text:p>
          </table:table-cell>
          <table:table-cell table:style-name="ce13" table:formula="of:=IF([.F5]&lt;=0; 4200*LN(([.D5]+273.15)/273.15); IF([.F5]&lt;1; 4200*LN(([.C5]+273.15)/273.15) + [.F5]*(2100000/([.C5]+273.15)); 4200*LN(([.C5]+273.15)/273.15) + (2100000/([.C5]+273.15)) + 4200*LN(([.D5]+273.15)/([.C5]+273.15))))" office:value-type="float" office:value="6760.17070258527" calcext:value-type="float">
            <text:p>6760</text:p>
          </table:table-cell>
          <table:table-cell table:style-name="ce23" table:formula="of:=IF([.G4] &lt;= 4200*LN(([.C5]+273.15)/273.15); 4200 * 273.15 * EXP([.G4] / 4200); IF([.G4] &gt;= 4200*LN(([.C5]+273.15)/273.15) + (2100000/([.C5]+273.15)); 4200 * ([.C5]+273.15) * EXP(([.G4] - 4200*LN(([.C5]+273.15)/273.15) - 2100000/([.C5]+273.15)) / 4200) + 2100000; 4200*([.C5]+273.15) + ([.G4] - 4200*LN(([.C5]+273.15)/273.15)) * ([.C5]+273.15)))" office:value-type="float" office:value="4004692.52291705" calcext:value-type="float">
            <text:p>4,004,693</text:p>
          </table:table-cell>
          <table:table-cell table:style-name="ce31" table:formula="of:=([.E4]-[.E5])/([.E4]-[.H5])" office:value-type="float" office:value="1.00335951530489" calcext:value-type="float">
            <text:p>1.00335951530489</text:p>
          </table:table-cell>
          <table:table-cell table:style-name="Default" office:value-type="string" calcext:value-type="string">
            <text:p>1<text:span text:style-name="T1">st</text:span> HP Stage</text:p>
          </table:table-cell>
          <table:table-cell/>
          <table:table-cell table:style-name="Default"/>
          <table:table-cell table:formula="of:=[.B5]/[.B$4]" office:value-type="float" office:value="0.161538461538462" calcext:value-type="float">
            <text:p>0.16153846153846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P Out</text:p>
          </table:table-cell>
          <table:table-cell office:value-type="float" office:value="3.5" calcext:value-type="float">
            <text:p>3.5</text:p>
          </table:table-cell>
          <table:table-cell table:formula="of:=SQRT(SQRT([.B6]))*100" office:value-type="float" office:value="136.778239986738" calcext:value-type="float">
            <text:p>136.78</text:p>
          </table:table-cell>
          <table:table-cell table:style-name="ce4" table:formula="of:=[.C6]" office:value-type="float" office:value="136.778239986738" calcext:value-type="float">
            <text:p>136.78</text:p>
          </table:table-cell>
          <table:table-cell table:style-name="ce2" table:formula="of:=([.D6]+273.15)*4200+2100000*[.F6]" office:value-type="float" office:value="3506698.6079443" calcext:value-type="float">
            <text:p>3,506,699</text:p>
          </table:table-cell>
          <table:table-cell table:style-name="ce3" office:value-type="float" office:value="0.85" calcext:value-type="float">
            <text:p>0.85</text:p>
          </table:table-cell>
          <table:table-cell table:style-name="ce13" table:formula="of:=IF([.F6]&lt;=0; 4200*LN(([.D6]+273.15)/273.15); IF([.F6]&lt;1; 4200*LN(([.C6]+273.15)/273.15) + [.F6]*(2100000/([.C6]+273.15)); 4200*LN(([.C6]+273.15)/273.15) + (2100000/([.C6]+273.15)) + 4200*LN(([.D6]+273.15)/([.C6]+273.15))))" office:value-type="float" office:value="6059.45697203324" calcext:value-type="float">
            <text:p>6059</text:p>
          </table:table-cell>
          <table:table-cell table:style-name="ce23" table:formula="of:=IF([.G4] &lt;= 4200*LN(([.C6]+273.15)/273.15); 4200 * 273.15 * EXP([.G4] / 4200); IF([.G4] &gt;= 4200*LN(([.C6]+273.15)/273.15) + (2100000/([.C6]+273.15)); 4200 * ([.C6]+273.15) * EXP(([.G4] - 4200*LN(([.C6]+273.15)/273.15) - 2100000/([.C6]+273.15)) / 4200) + 2100000; 4200*([.C6]+273.15) + ([.G4] - 4200*LN(([.C6]+273.15)/273.15)) * ([.C6]+273.15)))" office:value-type="float" office:value="3795263.47264037" calcext:value-type="float">
            <text:p>3,795,263</text:p>
          </table:table-cell>
          <table:table-cell table:style-name="ce31" table:formula="of:=([.E5]-[.E6])/([.E5]-[.H6])" office:value-type="float" office:value="2.38755437406071" calcext:value-type="float">
            <text:p>2.38755437406071</text:p>
          </table:table-cell>
          <table:table-cell table:style-name="Default" office:value-type="string" calcext:value-type="string">
            <text:p>2<text:span text:style-name="T1">nd</text:span> HP Stage</text:p>
          </table:table-cell>
          <table:table-cell/>
          <table:table-cell table:style-name="Default"/>
          <table:table-cell table:formula="of:=[.B6]/[.B$4]" office:value-type="float" office:value="0.0538461538461539" calcext:value-type="float">
            <text:p>0.053846153846153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P In</text:p>
          </table:table-cell>
          <table:table-cell table:style-name="ce3" office:value-type="float" office:value="3.5" calcext:value-type="float">
            <text:p>3.5</text:p>
          </table:table-cell>
          <table:table-cell table:formula="of:=SQRT(SQRT([.B7]))*100" office:value-type="float" office:value="136.778239986738" calcext:value-type="float">
            <text:p>136.78</text:p>
          </table:table-cell>
          <table:table-cell table:style-name="ce3" office:value-type="float" office:value="263" calcext:value-type="float">
            <text:p>263</text:p>
          </table:table-cell>
          <table:table-cell table:style-name="ce2" table:formula="of:=([.D7]+273.15)*4200+2100000" office:value-type="float" office:value="4351830" calcext:value-type="float">
            <text:p>4,351,830</text:p>
          </table:table-cell>
          <table:table-cell table:style-name="ce7" table:formula="of:=([.E7]-([.C7]+273.15)*4200)/2100000" office:value-type="float" office:value="1.25244352002652" calcext:value-type="float">
            <text:p>1.2524</text:p>
          </table:table-cell>
          <table:table-cell table:style-name="ce13" table:formula="of:=IF([.F7]&lt;=0; 4200*LN(([.D7]+273.15)/273.15); IF([.F7]&lt;1; 4200*LN(([.C7]+273.15)/273.15) + [.F7]*(2100000/([.C7]+273.15)); 4200*LN(([.C7]+273.15)/273.15) + (2100000/([.C7]+273.15)) + 4200*LN(([.D7]+273.15)/([.C7]+273.15))))" office:value-type="float" office:value="7955.29792986053" calcext:value-type="float">
            <text:p>7955</text:p>
          </table:table-cell>
          <table:table-cell table:style-name="ce23" table:formula="of:=IF([.G6] &lt;= 4200*LN(([.C7]+273.15)/273.15); 4200 * 273.15 * EXP([.G6] / 4200); IF([.G6] &gt;= 4200*LN(([.C7]+273.15)/273.15) + (2100000/([.C7]+273.15)); 4200 * ([.C7]+273.15) * EXP(([.G6] - 4200*LN(([.C7]+273.15)/273.15) - 2100000/([.C7]+273.15)) / 4200) + 2100000; 4200*([.C7]+273.15) + ([.G6] - 4200*LN(([.C7]+273.15)/273.15)) * ([.C7]+273.15)))" office:value-type="float" office:value="3506698.6079443" calcext:value-type="float">
            <text:p>3,506,699</text:p>
          </table:table-cell>
          <table:table-cell table:style-name="ce31"/>
          <table:table-cell table:style-name="ce12" office:value-type="string" calcext:value-type="string">
            <text:p>Reheater</text:p>
          </table:table-cell>
          <table:table-cell/>
          <table:table-cell table:style-name="Default"/>
          <table:table-cell table:formula="of:=[.B7]/[.B$4]" office:value-type="float" office:value="0.0538461538461539" calcext:value-type="float">
            <text:p>0.053846153846153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P Tap 1</text:p>
          </table:table-cell>
          <table:table-cell office:value-type="float" office:value="3" calcext:value-type="float">
            <text:p>3</text:p>
          </table:table-cell>
          <table:table-cell table:formula="of:=SQRT(SQRT([.B8]))*100" office:value-type="float" office:value="131.607401295249" calcext:value-type="float">
            <text:p>131.61</text:p>
          </table:table-cell>
          <table:table-cell table:style-name="ce3" office:value-type="float" office:value="234" calcext:value-type="float">
            <text:p>234</text:p>
          </table:table-cell>
          <table:table-cell table:style-name="ce2" table:formula="of:=([.D8]+273.15)*4200+2100000" office:value-type="float" office:value="4230030" calcext:value-type="float">
            <text:p>4,230,030</text:p>
          </table:table-cell>
          <table:table-cell table:style-name="ce7" table:formula="of:=([.E8]-([.C8]+273.15)*4200)/2100000" office:value-type="float" office:value="1.2047851974095" calcext:value-type="float">
            <text:p>1.2048</text:p>
          </table:table-cell>
          <table:table-cell table:style-name="ce13" table:formula="of:=IF([.F8]&lt;=0; 4200*LN(([.D8]+273.15)/273.15); IF([.F8]&lt;1; 4200*LN(([.C8]+273.15)/273.15) + [.F8]*(2100000/([.C8]+273.15)); 4200*LN(([.C8]+273.15)/273.15) + (2100000/([.C8]+273.15)) + 4200*LN(([.D8]+273.15)/([.C8]+273.15))))" office:value-type="float" office:value="7787.19305668151" calcext:value-type="float">
            <text:p>7787</text:p>
          </table:table-cell>
          <table:table-cell table:style-name="ce23" table:formula="of:=IF([.G7] &lt;= 4200*LN(([.C8]+273.15)/273.15); 4200 * 273.15 * EXP([.G7] / 4200); IF([.G7] &gt;= 4200*LN(([.C8]+273.15)/273.15) + (2100000/([.C8]+273.15)); 4200 * ([.C8]+273.15) * EXP(([.G7] - 4200*LN(([.C8]+273.15)/273.15) - 2100000/([.C8]+273.15)) / 4200) + 2100000; 4200*([.C8]+273.15) + ([.G7] - 4200*LN(([.C8]+273.15)/273.15)) * ([.C8]+273.15)))" office:value-type="float" office:value="4317013.53105638" calcext:value-type="float">
            <text:p>4,317,014</text:p>
          </table:table-cell>
          <table:table-cell table:style-name="ce31" table:formula="of:=([.E7]-[.E8])/([.E7]-[.H8])" office:value-type="float" office:value="3.49834442422166" calcext:value-type="float">
            <text:p>3.49834442422166</text:p>
          </table:table-cell>
          <table:table-cell table:style-name="Default" office:value-type="string" calcext:value-type="string">
            <text:p>1<text:span text:style-name="T1">st</text:span> LP Stage</text:p>
          </table:table-cell>
          <table:table-cell/>
          <table:table-cell table:style-name="Default"/>
          <table:table-cell table:formula="of:=[.B8]/[.B$4]" office:value-type="float" office:value="0.0461538461538462" calcext:value-type="float">
            <text:p>0.046153846153846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P Tap 2</text:p>
          </table:table-cell>
          <table:table-cell office:value-type="float" office:value="2.5" calcext:value-type="float">
            <text:p>2.5</text:p>
          </table:table-cell>
          <table:table-cell table:formula="of:=SQRT(SQRT([.B9]))*100" office:value-type="float" office:value="125.743342968294" calcext:value-type="float">
            <text:p>125.74</text:p>
          </table:table-cell>
          <table:table-cell table:style-name="ce3" office:value-type="float" office:value="200" calcext:value-type="float">
            <text:p>200</text:p>
          </table:table-cell>
          <table:table-cell table:style-name="ce2" table:formula="of:=([.D9]+273.15)*4200+2100000" office:value-type="float" office:value="4087230" calcext:value-type="float">
            <text:p>4,087,230</text:p>
          </table:table-cell>
          <table:table-cell table:style-name="ce7" table:formula="of:=([.E9]-([.C9]+273.15)*4200)/2100000" office:value-type="float" office:value="1.14851331406341" calcext:value-type="float">
            <text:p>1.1485</text:p>
          </table:table-cell>
          <table:table-cell table:style-name="ce13" table:formula="of:=IF([.F9]&lt;=0; 4200*LN(([.D9]+273.15)/273.15); IF([.F9]&lt;1; 4200*LN(([.C9]+273.15)/273.15) + [.F9]*(2100000/([.C9]+273.15)); 4200*LN(([.C9]+273.15)/273.15) + (2100000/([.C9]+273.15)) + 4200*LN(([.D9]+273.15)/([.C9]+273.15))))" office:value-type="float" office:value="7572.00891623365" calcext:value-type="float">
            <text:p>7572</text:p>
          </table:table-cell>
          <table:table-cell table:style-name="ce23" table:formula="of:=IF([.G8] &lt;= 4200*LN(([.C9]+273.15)/273.15); 4200 * 273.15 * EXP([.G8] / 4200); IF([.G8] &gt;= 4200*LN(([.C9]+273.15)/273.15) + (2100000/([.C9]+273.15)); 4200 * ([.C9]+273.15) * EXP(([.G8] - 4200*LN(([.C9]+273.15)/273.15) - 2100000/([.C9]+273.15)) / 4200) + 2100000; 4200*([.C9]+273.15) + ([.G8] - 4200*LN(([.C9]+273.15)/273.15)) * ([.C9]+273.15)))" office:value-type="float" office:value="4191697.69063467" calcext:value-type="float">
            <text:p>4,191,698</text:p>
          </table:table-cell>
          <table:table-cell table:style-name="ce31" table:formula="of:=([.E8]-[.E9])/([.E8]-[.H9])" office:value-type="float" office:value="3.72531690274726" calcext:value-type="float">
            <text:p>3.72531690274726</text:p>
          </table:table-cell>
          <table:table-cell table:style-name="Default" office:value-type="string" calcext:value-type="string">
            <text:p>2<text:span text:style-name="T1">nd</text:span> LP Stage</text:p>
          </table:table-cell>
          <table:table-cell/>
          <table:table-cell table:style-name="Default"/>
          <table:table-cell table:formula="of:=[.B9]/[.B$4]" office:value-type="float" office:value="0.0384615384615385" calcext:value-type="float">
            <text:p>0.038461538461538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P Tap 3</text:p>
          </table:table-cell>
          <table:table-cell office:value-type="float" office:value="2" calcext:value-type="float">
            <text:p>2</text:p>
          </table:table-cell>
          <table:table-cell table:formula="of:=SQRT(SQRT([.B10]))*100" office:value-type="float" office:value="118.920711500272" calcext:value-type="float">
            <text:p>118.92</text:p>
          </table:table-cell>
          <table:table-cell table:style-name="ce3" office:value-type="float" office:value="166" calcext:value-type="float">
            <text:p>166</text:p>
          </table:table-cell>
          <table:table-cell table:style-name="ce2" table:formula="of:=([.D10]+273.15)*4200+2100000" office:value-type="float" office:value="3944430" calcext:value-type="float">
            <text:p>3,944,430</text:p>
          </table:table-cell>
          <table:table-cell table:style-name="ce7" table:formula="of:=([.E10]-([.C10]+273.15)*4200)/2100000" office:value-type="float" office:value="1.09415857699946" calcext:value-type="float">
            <text:p>1.0942</text:p>
          </table:table-cell>
          <table:table-cell table:style-name="ce13" table:formula="of:=IF([.F10]&lt;=0; 4200*LN(([.D10]+273.15)/273.15); IF([.F10]&lt;1; 4200*LN(([.C10]+273.15)/273.15) + [.F10]*(2100000/([.C10]+273.15)); 4200*LN(([.C10]+273.15)/273.15) + (2100000/([.C10]+273.15)) + 4200*LN(([.D10]+273.15)/([.C10]+273.15))))" office:value-type="float" office:value="7350.42044647449" calcext:value-type="float">
            <text:p>7350</text:p>
          </table:table-cell>
          <table:table-cell table:style-name="ce23" table:formula="of:=IF([.G9] &lt;= 4200*LN(([.C10]+273.15)/273.15); 4200 * 273.15 * EXP([.G9] / 4200); IF([.G9] &gt;= 4200*LN(([.C10]+273.15)/273.15) + (2100000/([.C10]+273.15)); 4200 * ([.C10]+273.15) * EXP(([.G9] - 4200*LN(([.C10]+273.15)/273.15) - 2100000/([.C10]+273.15)) / 4200) + 2100000; 4200*([.C10]+273.15) + ([.G9] - 4200*LN(([.C10]+273.15)/273.15)) * ([.C10]+273.15)))" office:value-type="float" office:value="4044353.33485813" calcext:value-type="float">
            <text:p>4,044,353</text:p>
          </table:table-cell>
          <table:table-cell table:style-name="ce31" table:formula="of:=([.E9]-[.E10])/([.E9]-[.H10])" office:value-type="float" office:value="3.3304828985068" calcext:value-type="float">
            <text:p>3.3304828985068</text:p>
          </table:table-cell>
          <table:table-cell table:style-name="Default"/>
          <table:table-cell/>
          <table:table-cell table:style-name="Default"/>
          <table:table-cell table:formula="of:=[.B10]/[.B$4]" office:value-type="float" office:value="0.0307692307692308" calcext:value-type="float">
            <text:p>0.03076923076923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P Tap 4</text:p>
          </table:table-cell>
          <table:table-cell office:value-type="float" office:value="1.5" calcext:value-type="float">
            <text:p>1.5</text:p>
          </table:table-cell>
          <table:table-cell table:formula="of:=SQRT(SQRT([.B11]))*100" office:value-type="float" office:value="110.668191970032" calcext:value-type="float">
            <text:p>110.67</text:p>
          </table:table-cell>
          <table:table-cell table:style-name="ce3" office:value-type="float" office:value="133" calcext:value-type="float">
            <text:p>133</text:p>
          </table:table-cell>
          <table:table-cell table:style-name="ce2" table:formula="of:=([.D11]+273.15)*4200+2100000" office:value-type="float" office:value="3805830" calcext:value-type="float">
            <text:p>3,805,830</text:p>
          </table:table-cell>
          <table:table-cell table:style-name="ce7" table:formula="of:=([.E11]-([.C11]+273.15)*4200)/2100000" office:value-type="float" office:value="1.04466361605994" calcext:value-type="float">
            <text:p>1.0447</text:p>
          </table:table-cell>
          <table:table-cell table:style-name="ce13" table:formula="of:=IF([.F11]&lt;=0; 4200*LN(([.D11]+273.15)/273.15); IF([.F11]&lt;1; 4200*LN(([.C11]+273.15)/273.15) + [.F11]*(2100000/([.C11]+273.15)); 4200*LN(([.C11]+273.15)/273.15) + (2100000/([.C11]+273.15)) + 4200*LN(([.D11]+273.15)/([.C11]+273.15))))" office:value-type="float" office:value="7137.48656171056" calcext:value-type="float">
            <text:p>7137</text:p>
          </table:table-cell>
          <table:table-cell table:style-name="ce23" table:formula="of:=IF([.G10] &lt;= 4200*LN(([.C11]+273.15)/273.15); 4200 * 273.15 * EXP([.G10] / 4200); IF([.G10] &gt;= 4200*LN(([.C11]+273.15)/273.15) + (2100000/([.C11]+273.15)); 4200 * ([.C11]+273.15) * EXP(([.G10] - 4200*LN(([.C11]+273.15)/273.15) - 2100000/([.C11]+273.15)) / 4200) + 2100000; 4200*([.C11]+273.15) + ([.G10] - 4200*LN(([.C11]+273.15)/273.15)) * ([.C11]+273.15)))" office:value-type="float" office:value="3894542.90375989" calcext:value-type="float">
            <text:p>3,894,543</text:p>
          </table:table-cell>
          <table:table-cell table:style-name="ce31" table:formula="of:=([.E10]-[.E11])/([.E10]-[.H11])" office:value-type="float" office:value="2.7782735505973" calcext:value-type="float">
            <text:p>2.7782735505973</text:p>
          </table:table-cell>
          <table:table-cell table:style-name="Default"/>
          <table:table-cell/>
          <table:table-cell table:style-name="Default"/>
          <table:table-cell table:formula="of:=[.B11]/[.B$4]" office:value-type="float" office:value="0.0230769230769231" calcext:value-type="float">
            <text:p>0.02307692307692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P Out</text:p>
          </table:table-cell>
          <table:table-cell office:value-type="float" office:value="0.006147" calcext:value-type="float">
            <text:p>0.006147</text:p>
          </table:table-cell>
          <table:table-cell table:formula="of:=SQRT(SQRT([.B12]))*100" office:value-type="float" office:value="28.0005010798435" calcext:value-type="float">
            <text:p>28.00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formula="of:=([.D12]+273.15)*4200+2100000*[.F12]" office:value-type="float" office:value="3154830" calcext:value-type="float">
            <text:p>3,154,830</text:p>
          </table:table-cell>
          <table:table-cell table:style-name="ce3" office:value-type="float" office:value="0.9" calcext:value-type="float">
            <text:p>0.9</text:p>
          </table:table-cell>
          <table:table-cell table:style-name="ce13" table:formula="of:=IF([.F12]&lt;=0; 4200*LN(([.D12]+273.15)/273.15); IF([.F12]&lt;1; 4200*LN(([.C12]+273.15)/273.15) + [.F12]*(2100000/([.C12]+273.15)); 4200*LN(([.C12]+273.15)/273.15) + (2100000/([.C12]+273.15)) + 4200*LN(([.D12]+273.15)/([.C12]+273.15))))" office:value-type="float" office:value="6685.80578288233" calcext:value-type="float">
            <text:p>6686</text:p>
          </table:table-cell>
          <table:table-cell table:style-name="ce23" table:formula="of:=IF([.G11] &lt;= 4200*LN(([.C12]+273.15)/273.15); 4200 * 273.15 * EXP([.G11] / 4200); IF([.G11] &gt;= 4200*LN(([.C12]+273.15)/273.15) + (2100000/([.C12]+273.15)); 4200 * ([.C12]+273.15) * EXP(([.G11] - 4200*LN(([.C12]+273.15)/273.15) - 2100000/([.C12]+273.15)) / 4200) + 2100000; 4200*([.C12]+273.15) + ([.G11] - 4200*LN(([.C12]+273.15)/273.15)) * ([.C12]+273.15)))" office:value-type="float" office:value="3290855.9974076" calcext:value-type="float">
            <text:p>3,290,856</text:p>
          </table:table-cell>
          <table:table-cell table:style-name="ce31" table:formula="of:=([.E11]-[.E12])/([.E11]-[.H12])" office:value-type="float" office:value="1.26414148427462" calcext:value-type="float">
            <text:p>1.26414148427462</text:p>
          </table:table-cell>
          <table:table-cell table:style-name="Default" office:value-type="string" calcext:value-type="string">
            <text:p>5<text:span text:style-name="T1">th</text:span> LP Stage</text:p>
          </table:table-cell>
          <table:table-cell/>
          <table:table-cell table:style-name="Default"/>
          <table:table-cell table:formula="of:=[.B12]/[.B$4]" office:value-type="float" office:value="0.0000945692307692308" calcext:value-type="float">
            <text:p>9.45692307692308E-0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office:value-type="string" calcext:value-type="string" table:number-columns-spanned="10" table:number-rows-spanned="1">
            <text:p>The turbine was designed by setting the numbers marked in red for full load power. Some where estimates and guesses, some are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office:value-type="string" calcext:value-type="string" table:number-columns-spanned="10" table:number-rows-spanned="1">
            <text:p>taken from the actual turbine data. An entropy value is then calculated and an energy h which describes the energy that would 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office:value-type="string" calcext:value-type="string" table:number-columns-spanned="10" table:number-rows-spanned="1">
            <text:p>be there with constant entropy. This is then used to calculate an expansion factor which can be used to get back to the original values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table:number-columns-spanned="10" table:number-rows-spanned="1"/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office:value-type="string" calcext:value-type="string" table:number-columns-spanned="10" table:number-rows-spanned="1">
            <text:p>Other working points of the turbine are then extrapolated by using the expansion factor from full load which was obtained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office:value-type="string" calcext:value-type="string" table:number-columns-spanned="10" table:number-rows-spanned="1">
            <text:p>and using an isentropic process which considers that expansion factor.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ce33" office:value-type="string" calcext:value-type="string" table:number-columns-spanned="3" table:number-rows-spanned="1">
            <text:p>Points either to Set or Calculated</text:p>
          </table:table-cell>
          <table:covered-table-cell table:style-name="Default"/>
          <table:covered-table-cell/>
          <table:table-cell table:number-columns-repeated="16371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actual s</text:p>
          </table:table-cell>
          <table:table-cell table:style-name="Default" office:value-type="string" calcext:value-type="string">
            <text:p>actual h</text:p>
          </table:table-cell>
          <table:table-cell office:value-type="string" calcext:value-type="string">
            <text:p>actual T</text:p>
          </table:table-cell>
          <table:table-cell office:value-type="string" calcext:value-type="string">
            <text:p>ideal out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on node</text:p>
          </table:table-cell>
          <table:table-cell table:style-name="Default" office:value-type="string" calcext:value-type="string">
            <text:p>on node</text:p>
          </table:table-cell>
          <table:table-cell office:value-type="string" calcext:value-type="string">
            <text:p>on node</text:p>
          </table:table-cell>
          <table:table-cell office:value-type="string" calcext:value-type="string">
            <text:p>isentropic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Full Load Validation</text:p>
          </table:table-cell>
          <table:table-cell table:style-name="Default"/>
          <table:table-cell table:style-name="ce25" office:value-type="string" calcext:value-type="string" table:number-columns-spanned="3" table:number-rows-spanned="1">
            <text:p>Calculated for given p and X</text:p>
          </table:table-cell>
          <table:covered-table-cell/>
          <table:covered-table-cell table:style-name="Default"/>
          <table:table-cell table:style-name="ce25" office:value-type="string" calcext:value-type="string" table:number-columns-spanned="4" table:number-rows-spanned="1">
            <text:p>Those are values derived from set values</text:p>
          </table:table-cell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/>
          <table:table-cell office:value-type="string" calcext:value-type="string">
            <text:p>enthalpy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_Satt(p)</text:p>
          </table:table-cell>
          <table:table-cell table:style-name="ce1" office:value-type="string" calcext:value-type="string">
            <text:p>h_X0</text:p>
          </table:table-cell>
          <table:table-cell table:style-name="ce1" office:value-type="string" calcext:value-type="string">
            <text:p>s_X=0.0</text:p>
          </table:table-cell>
          <table:table-cell table:style-name="ce1" office:value-type="string" calcext:value-type="string">
            <text:p>s_X=1.0</text:p>
          </table:table-cell>
          <table:table-cell table:style-name="ce1" office:value-type="string" calcext:value-type="string">
            <text:p>T_set</text:p>
          </table:table-cell>
          <table:table-cell table:style-name="ce1" office:value-type="string" calcext:value-type="string">
            <text:p>h(t_set)</text:p>
          </table:table-cell>
          <table:table-cell table:style-name="ce1" office:value-type="string" calcext:value-type="string">
            <text:p>X_set</text:p>
          </table:table-cell>
          <table:table-cell table:style-name="ce1" office:value-type="string" calcext:value-type="string">
            <text:p>s_se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_2s</text:p>
          </table:table-cell>
          <table:table-cell table:style-name="ce1" office:value-type="string" calcext:value-type="string">
            <text:p>kToPrev</text:p>
          </table:table-cell>
          <table:table-cell table:style-name="ce1" office:value-type="string" calcext:value-type="string">
            <text:p>h_Expanded</text:p>
          </table:table-cell>
          <table:table-cell table:style-name="ce1" office:value-type="string" calcext:value-type="string">
            <text:p>X_calc</text:p>
          </table:table-cell>
          <table:table-cell table:style-name="ce1" office:value-type="string" calcext:value-type="string">
            <text:p>T_calc</text:p>
          </table:table-cell>
          <table:table-cell table:style-name="ce1" office:value-type="string" calcext:value-type="string">
            <text:p>s_calc</text:p>
          </table:table-cell>
          <table:table-cell table:style-name="ce1" table:number-columns-repeated="16365"/>
        </table:table-row>
        <table:table-row table:style-name="ro1">
          <table:table-cell table:formula="of:=[.A$3]" office:value-type="string" office:string-value="Drum Out" calcext:value-type="string">
            <text:p>Drum Out</text:p>
          </table:table-cell>
          <table:table-cell table:style-name="ce16" office:value-type="float" office:value="65" calcext:value-type="float">
            <text:p>65</text:p>
          </table:table-cell>
          <table:table-cell table:formula="of:=SQRT(SQRT([.B24]))*100" office:value-type="float" office:value="283.941151443368" calcext:value-type="float">
            <text:p>283.94</text:p>
          </table:table-cell>
          <table:table-cell table:formula="of:=4200*([.C24]+273.15)" office:value-type="float" office:value="2339782.83606215" calcext:value-type="float">
            <text:p>2339782.83606215</text:p>
          </table:table-cell>
          <table:table-cell table:formula="of:=4200 * LN(([.C24] + 273.15) / 273.15)" office:value-type="float" office:value="2993.37267101204" calcext:value-type="float">
            <text:p>2993.37267101204</text:p>
          </table:table-cell>
          <table:table-cell table:formula="of:=[.E24] + (2100000 / ([.C24] + 273.15))" office:value-type="float" office:value="6762.95327655408" calcext:value-type="float">
            <text:p>6762.95327655408</text:p>
          </table:table-cell>
          <table:table-cell table:style-name="ce4" table:formula="of:=SQRT(SQRT([.B24]))*100" office:value-type="float" office:value="283.941151443368" calcext:value-type="float">
            <text:p>283.94</text:p>
          </table:table-cell>
          <table:table-cell table:formula="of:=([.G24]+273.15)*4200+2100000" office:value-type="float" office:value="4439782.83606214" calcext:value-type="float">
            <text:p>4439783</text:p>
          </table:table-cell>
          <table:table-cell table:style-name="ce7" table:formula="of:=([.H24]-([.C24]+273.15)*4200)/2100000" office:value-type="float" office:value="1" calcext:value-type="float">
            <text:p>1.0000</text:p>
          </table:table-cell>
          <table:table-cell table:formula="of:=IF([.I24]&lt;=0; 4200*LN(([.G24]+273.15)/273.15); IF([.I24]&lt;1; 4200*LN(([.C24]+273.15)/273.15) + [.I24]*(2100000/([.C24]+273.15)); 4200*LN(([.C24]+273.15)/273.15) + (2100000/([.C24]+273.15)) + 4200*LN(([.G24]+273.15)/([.C24]+273.15))))" office:value-type="float" office:value="6762.95327655408" calcext:value-type="float">
            <text:p>6763</text:p>
          </table:table-cell>
          <table:table-cell table:style-name="ce11"/>
          <table:table-cell/>
          <table:table-cell table:style-name="ce4"/>
          <table:table-cell table:style-name="ce2"/>
          <table:table-cell table:style-name="ce7"/>
          <table:table-cell table:style-name="ce2"/>
          <table:table-cell/>
          <table:table-cell table:style-name="ce4"/>
          <table:table-cell table:number-columns-repeated="16366"/>
        </table:table-row>
        <table:table-row table:style-name="ro1">
          <table:table-cell table:formula="of:=[.A$4]" office:value-type="string" office:string-value="HP In" calcext:value-type="string">
            <text:p>HP In</text:p>
          </table:table-cell>
          <table:table-cell table:style-name="ce16" office:value-type="float" office:value="65" calcext:value-type="float">
            <text:p>65</text:p>
          </table:table-cell>
          <table:table-cell table:formula="of:=SQRT(SQRT([.B25]))*100" office:value-type="float" office:value="283.941151443368" calcext:value-type="float">
            <text:p>283.94</text:p>
          </table:table-cell>
          <table:table-cell table:formula="of:=4200*([.C25]+273.15)" office:value-type="float" office:value="2339782.83606215" calcext:value-type="float">
            <text:p>2339782.83606215</text:p>
          </table:table-cell>
          <table:table-cell table:formula="of:=4200 * LN(([.C25] + 273.15) / 273.15)" office:value-type="float" office:value="2993.37267101204" calcext:value-type="float">
            <text:p>2993.37267101204</text:p>
          </table:table-cell>
          <table:table-cell table:formula="of:=[.E25] + (2100000 / ([.C25] + 273.15))" office:value-type="float" office:value="6762.95327655408" calcext:value-type="float">
            <text:p>6762.95327655408</text:p>
          </table:table-cell>
          <table:table-cell table:style-name="ce4" table:formula="of:=[.G24]" office:value-type="float" office:value="283.941151443368" calcext:value-type="float">
            <text:p>283.94</text:p>
          </table:table-cell>
          <table:table-cell table:formula="of:=([.G25]+273.15)*4200+2100000" office:value-type="float" office:value="4439782.83606214" calcext:value-type="float">
            <text:p>4439783</text:p>
          </table:table-cell>
          <table:table-cell table:style-name="ce7" table:formula="of:=([.H25]-([.C25]+273.15)*4200)/2100000" office:value-type="float" office:value="1" calcext:value-type="float">
            <text:p>1.0000</text:p>
          </table:table-cell>
          <table:table-cell table:formula="of:=IF([.I25]&lt;=0; 4200*LN(([.G25]+273.15)/273.15); IF([.I25]&lt;1; 4200*LN(([.C25]+273.15)/273.15) + [.I25]*(2100000/([.C25]+273.15)); 4200*LN(([.C25]+273.15)/273.15) + (2100000/([.C25]+273.15)) + 4200*LN(([.G25]+273.15)/([.C25]+273.15))))" office:value-type="float" office:value="6762.95327655408" calcext:value-type="float">
            <text:p>6763</text:p>
          </table:table-cell>
          <table:table-cell table:style-name="ce11" table:formula="of:=[.J25]" office:value-type="float" office:value="6762.95327655408" calcext:value-type="float">
            <text:p>6763</text:p>
          </table:table-cell>
          <table:table-cell table:formula="of:=[.H25]" office:value-type="float" office:value="4439782.83606214" calcext:value-type="float">
            <text:p>4,439,783</text:p>
          </table:table-cell>
          <table:table-cell table:style-name="ce43" table:formula="of:=[.G25]" office:value-type="float" office:value="283.941151443368" calcext:value-type="float">
            <text:p>283.94</text:p>
          </table:table-cell>
          <table:table-cell table:style-name="ce2"/>
          <table:table-cell table:style-name="ce7"/>
          <table:table-cell table:style-name="ce2"/>
          <table:table-cell/>
          <table:table-cell table:style-name="ce4"/>
          <table:table-cell table:number-columns-repeated="16366"/>
        </table:table-row>
        <table:table-row table:style-name="ro1">
          <table:table-cell table:formula="of:=[.A$5]" office:value-type="string" office:string-value="HP Mid" calcext:value-type="string">
            <text:p>HP Mid</text:p>
          </table:table-cell>
          <table:table-cell office:value-type="float" office:value="10.5" calcext:value-type="float">
            <text:p>10.5</text:p>
          </table:table-cell>
          <table:table-cell table:formula="of:=SQRT(SQRT([.B26]))*100" office:value-type="float" office:value="180.010287183925" calcext:value-type="float">
            <text:p>180.01</text:p>
          </table:table-cell>
          <table:table-cell table:formula="of:=4200*([.C26]+273.15)" office:value-type="float" office:value="1903273.20617249" calcext:value-type="float">
            <text:p>1903273.20617249</text:p>
          </table:table-cell>
          <table:table-cell table:formula="of:=4200 * LN(([.C26] + 273.15) / 273.15)" office:value-type="float" office:value="2126.14417217842" calcext:value-type="float">
            <text:p>2126.14417217842</text:p>
          </table:table-cell>
          <table:table-cell table:formula="of:=[.E26] + (2100000 / ([.C26] + 273.15))" office:value-type="float" office:value="6760.26604779562" calcext:value-type="float">
            <text:p>6760.26604779562</text:p>
          </table:table-cell>
          <table:table-cell table:number-columns-repeated="2"/>
          <table:table-cell table:style-name="ce7"/>
          <table:table-cell/>
          <table:table-cell table:style-name="ce14" table:formula="of:=[.S26]" office:value-type="float" office:value="6759.68820352221" calcext:value-type="float">
            <text:p>6760</text:p>
          </table:table-cell>
          <table:table-cell table:formula="of:=[.P26]" office:value-type="float" office:value="4003011.3500956" calcext:value-type="float">
            <text:p>4,003,011</text:p>
          </table:table-cell>
          <table:table-cell table:style-name="ce43" table:formula="of:=[.R26]" office:value-type="float" office:value="180.010287183925" calcext:value-type="float">
            <text:p>180.01</text:p>
          </table:table-cell>
          <table:table-cell table:style-name="ce15" table:formula="of:=IF([.K25] &lt;= [.E26]; 4200 * 273.15 * EXP([.K25] / 4200); IF([.K25] &gt;= [.F26]; 4200 * ([.C26]+ 273.15) * EXP(([.K25] - [.F26]) / 4200) + 2100000; [.D26] + ([.C26] + 273.15) * ([.K25] - [.E26])))" office:value-type="float" office:value="4004491.3411782" calcext:value-type="float">
            <text:p>4,004,491</text:p>
          </table:table-cell>
          <table:table-cell table:style-name="ce7" office:value-type="float" office:value="1.0034" calcext:value-type="float">
            <text:p>1.0034</text:p>
          </table:table-cell>
          <table:table-cell table:style-name="ce2" table:formula="of:=[.L25]-[.O26]*([.L25]-[.N26])" office:value-type="float" office:value="4003011.3500956" calcext:value-type="float">
            <text:p>4,003,011</text:p>
          </table:table-cell>
          <table:table-cell table:style-name="ce36" table:formula="of:=([.L26]-([.C26]+273.15)*4200)/2100000" office:value-type="float" office:value="0.999875306630053" calcext:value-type="float">
            <text:p>1.000</text:p>
          </table:table-cell>
          <table:table-cell table:style-name="ce4" table:formula="of:=IF([.Q26] &lt;= 1; ([.L26]-[.Q26]*2100000)/4200-273.15; ([.L26]-2100000)/4200-273.15)" office:value-type="float" office:value="180.010287183925" calcext:value-type="float">
            <text:p>180.01</text:p>
          </table:table-cell>
          <table:table-cell table:style-name="ce13" table:formula="of:=IF([.Q26]&lt;=0; 4200*LN(([.R26]+273.15)/273.15); IF([.Q26]&lt;1; 4200*LN(([.C26]+273.15)/273.15) + [.Q26]*(2100000/([.C26]+273.15)); 4200*LN(([.C26]+273.15)/273.15) + (2100000/([.C26]+273.15)) + 4200*LN(([.R26]+273.15)/([.C26]+273.15))))" office:value-type="float" office:value="6759.68820352221" calcext:value-type="float">
            <text:p>6760</text:p>
          </table:table-cell>
          <table:table-cell table:number-columns-repeated="16365"/>
        </table:table-row>
        <table:table-row table:style-name="ro1">
          <table:table-cell table:formula="of:=[.A$6]" office:value-type="string" office:string-value="HP Out" calcext:value-type="string">
            <text:p>HP Out</text:p>
          </table:table-cell>
          <table:table-cell office:value-type="float" office:value="3.5" calcext:value-type="float">
            <text:p>3.5</text:p>
          </table:table-cell>
          <table:table-cell table:formula="of:=SQRT(SQRT([.B27]))*100" office:value-type="float" office:value="136.778239986738" calcext:value-type="float">
            <text:p>136.78</text:p>
          </table:table-cell>
          <table:table-cell table:formula="of:=4200*([.C27]+273.15)" office:value-type="float" office:value="1721698.6079443" calcext:value-type="float">
            <text:p>1721698.6079443</text:p>
          </table:table-cell>
          <table:table-cell table:formula="of:=4200 * LN(([.C27] + 273.15) / 273.15)" office:value-type="float" office:value="1705.03630548499" calcext:value-type="float">
            <text:p>1705.03630548499</text:p>
          </table:table-cell>
          <table:table-cell table:formula="of:=[.E27] + (2100000 / ([.C27] + 273.15))" office:value-type="float" office:value="6827.88414848293" calcext:value-type="float">
            <text:p>6827.88414848293</text:p>
          </table:table-cell>
          <table:table-cell table:number-columns-repeated="2"/>
          <table:table-cell table:style-name="ce7"/>
          <table:table-cell/>
          <table:table-cell table:style-name="ce11" table:formula="of:=[.S27]" office:value-type="float" office:value="6051.31901508686" calcext:value-type="float">
            <text:p>6051</text:p>
          </table:table-cell>
          <table:table-cell table:formula="of:=[.P27]" office:value-type="float" office:value="3503362.62957618" calcext:value-type="float">
            <text:p>3,503,363</text:p>
          </table:table-cell>
          <table:table-cell table:style-name="ce43" table:formula="of:=[.R27]" office:value-type="float" office:value="136.778239986738" calcext:value-type="float">
            <text:p>136.78</text:p>
          </table:table-cell>
          <table:table-cell table:style-name="ce15" table:formula="of:=IF([.K26] &lt;= [.E27]; 4200 * 273.15 * EXP([.K26] / 4200); IF([.K26] &gt;= [.F27]; 4200 * ([.C27]+ 273.15) * EXP(([.K26] - [.F27]) / 4200) + 2100000; [.D27] + ([.C27] + 273.15) * ([.K26] - [.E27])))" office:value-type="float" office:value="3793743.16425232" calcext:value-type="float">
            <text:p>3,793,743</text:p>
          </table:table-cell>
          <table:table-cell table:style-name="ce7" office:value-type="float" office:value="2.3876" calcext:value-type="float">
            <text:p>2.3876</text:p>
          </table:table-cell>
          <table:table-cell table:style-name="ce2" table:formula="of:=[.L26]-[.O27]*([.L26]-[.N27])" office:value-type="float" office:value="3503362.62957618" calcext:value-type="float">
            <text:p>3,503,363</text:p>
          </table:table-cell>
          <table:table-cell table:style-name="ce46" table:formula="of:=([.L27]-([.C27]+273.15)*4200)/2100000" office:value-type="float" office:value="0.848411438872326" calcext:value-type="float">
            <text:p>0.848</text:p>
          </table:table-cell>
          <table:table-cell table:style-name="ce4" table:formula="of:=IF([.Q27] &lt;= 1; ([.L27]-[.Q27]*2100000)/4200-273.15; ([.L27]-2100000)/4200-273.15)" office:value-type="float" office:value="136.778239986738" calcext:value-type="float">
            <text:p>136.78</text:p>
          </table:table-cell>
          <table:table-cell table:style-name="ce13" table:formula="of:=IF([.Q27]&lt;=0; 4200*LN(([.R27]+273.15)/273.15); IF([.Q27]&lt;1; 4200*LN(([.C27]+273.15)/273.15) + [.Q27]*(2100000/([.C27]+273.15)); 4200*LN(([.C27]+273.15)/273.15) + (2100000/([.C27]+273.15)) + 4200*LN(([.R27]+273.15)/([.C27]+273.15))))" office:value-type="float" office:value="6051.31901508686" calcext:value-type="float">
            <text:p>6051</text:p>
          </table:table-cell>
          <table:table-cell table:number-columns-repeated="16365"/>
        </table:table-row>
        <table:table-row table:style-name="ro1">
          <table:table-cell table:formula="of:=[.A$7]" office:value-type="string" office:string-value="LP In" calcext:value-type="string">
            <text:p>LP In</text:p>
          </table:table-cell>
          <table:table-cell table:style-name="ce17" office:value-type="float" office:value="3.5" calcext:value-type="float">
            <text:p>3.5</text:p>
          </table:table-cell>
          <table:table-cell table:formula="of:=SQRT(SQRT([.B28]))*100" office:value-type="float" office:value="136.778239986738" calcext:value-type="float">
            <text:p>136.78</text:p>
          </table:table-cell>
          <table:table-cell table:formula="of:=4200*([.C28]+273.15)" office:value-type="float" office:value="1721698.6079443" calcext:value-type="float">
            <text:p>1721698.6079443</text:p>
          </table:table-cell>
          <table:table-cell table:formula="of:=4200 * LN(([.C28] + 273.15) / 273.15)" office:value-type="float" office:value="1705.03630548499" calcext:value-type="float">
            <text:p>1705.03630548499</text:p>
          </table:table-cell>
          <table:table-cell table:formula="of:=[.E28] + (2100000 / ([.C28] + 273.15))" office:value-type="float" office:value="6827.88414848293" calcext:value-type="float">
            <text:p>6827.88414848293</text:p>
          </table:table-cell>
          <table:table-cell table:style-name="ce16" office:value-type="float" office:value="263" calcext:value-type="float">
            <text:p>263</text:p>
          </table:table-cell>
          <table:table-cell table:formula="of:=([.G28]+273.15)*4200+2100000" office:value-type="float" office:value="4351830" calcext:value-type="float">
            <text:p>4351830</text:p>
          </table:table-cell>
          <table:table-cell table:style-name="ce7" table:formula="of:=([.H28]-([.C28]+273.15)*4200)/2100000" office:value-type="float" office:value="1.25244352002652" calcext:value-type="float">
            <text:p>1.2524</text:p>
          </table:table-cell>
          <table:table-cell table:formula="of:=IF([.I28]&lt;=0; 4200*LN(([.G28]+273.15)/273.15); IF([.I28]&lt;1; 4200*LN(([.C28]+273.15)/273.15) + [.I28]*(2100000/([.C28]+273.15)); 4200*LN(([.C28]+273.15)/273.15) + (2100000/([.C28]+273.15)) + 4200*LN(([.G28]+273.15)/([.C28]+273.15))))" office:value-type="float" office:value="7955.29792986053" calcext:value-type="float">
            <text:p>7955</text:p>
          </table:table-cell>
          <table:table-cell table:style-name="ce11" table:formula="of:=[.J28]" office:value-type="float" office:value="7955.29792986053" calcext:value-type="float">
            <text:p>7955</text:p>
          </table:table-cell>
          <table:table-cell table:formula="of:=[.H28]" office:value-type="float" office:value="4351830" calcext:value-type="float">
            <text:p>4,351,830</text:p>
          </table:table-cell>
          <table:table-cell table:style-name="ce43" table:formula="of:=[.G28]" office:value-type="float" office:value="263" calcext:value-type="float">
            <text:p>263.00</text:p>
          </table:table-cell>
          <table:table-cell/>
          <table:table-cell table:style-name="ce7"/>
          <table:table-cell/>
          <table:table-cell table:style-name="ce36"/>
          <table:table-cell table:style-name="ce4"/>
          <table:table-cell table:style-name="ce13"/>
          <table:table-cell table:number-columns-repeated="16365"/>
        </table:table-row>
        <table:table-row table:style-name="ro1">
          <table:table-cell table:formula="of:=[.A$8]" office:value-type="string" office:string-value="LP Tap 1" calcext:value-type="string">
            <text:p>LP Tap 1</text:p>
          </table:table-cell>
          <table:table-cell office:value-type="float" office:value="3" calcext:value-type="float">
            <text:p>3</text:p>
          </table:table-cell>
          <table:table-cell table:formula="of:=SQRT(SQRT([.B29]))*100" office:value-type="float" office:value="131.607401295249" calcext:value-type="float">
            <text:p>131.61</text:p>
          </table:table-cell>
          <table:table-cell table:formula="of:=4200*([.C29]+273.15)" office:value-type="float" office:value="1699981.08544005" calcext:value-type="float">
            <text:p>1699981.08544005</text:p>
          </table:table-cell>
          <table:table-cell table:formula="of:=4200 * LN(([.C29] + 273.15) / 273.15)" office:value-type="float" office:value="1651.72049128642" calcext:value-type="float">
            <text:p>1651.72049128642</text:p>
          </table:table-cell>
          <table:table-cell table:formula="of:=[.E29] + (2100000 / ([.C29] + 273.15))" office:value-type="float" office:value="6840.01351145077" calcext:value-type="float">
            <text:p>6840.01351145077</text:p>
          </table:table-cell>
          <table:table-cell table:number-columns-repeated="4"/>
          <table:table-cell table:style-name="ce11" table:formula="of:=[.S29]" office:value-type="float" office:value="7787.19610645764" calcext:value-type="float">
            <text:p>7787</text:p>
          </table:table-cell>
          <table:table-cell table:formula="of:=[.P29]" office:value-type="float" office:value="4230031.54669452" calcext:value-type="float">
            <text:p>4,230,032</text:p>
          </table:table-cell>
          <table:table-cell table:style-name="ce43" table:formula="of:=[.R29]" office:value-type="float" office:value="234.000368260601" calcext:value-type="float">
            <text:p>234.00</text:p>
          </table:table-cell>
          <table:table-cell table:style-name="ce15" table:formula="of:=IF([.K28] &lt;= [.E29]; 4200 * 273.15 * EXP([.K28] / 4200); IF([.K28] &gt;= [.F29]; 4200 * ([.C29]+ 273.15) * EXP(([.K28] - [.F29]) / 4200) + 2100000; [.D29] + ([.C29] + 273.15) * ([.K28] - [.E29])))" office:value-type="float" office:value="4317013.53105638" calcext:value-type="float">
            <text:p>4,317,014</text:p>
          </table:table-cell>
          <table:table-cell table:style-name="ce7" office:value-type="float" office:value="3.4983" calcext:value-type="float">
            <text:p>3.4983</text:p>
          </table:table-cell>
          <table:table-cell table:style-name="ce2" table:formula="of:=[.L28]-[.O29]*([.L28]-[.N29])" office:value-type="float" office:value="4230031.54669452" calcext:value-type="float">
            <text:p>4,230,032</text:p>
          </table:table-cell>
          <table:table-cell table:style-name="ce36" table:formula="of:=([.L29]-([.C29]+273.15)*4200)/2100000" office:value-type="float" office:value="1.2047859339307" calcext:value-type="float">
            <text:p>1.205</text:p>
          </table:table-cell>
          <table:table-cell table:style-name="ce4" table:formula="of:=IF([.Q29] &lt;= 1; ([.L29]-[.Q29]*2100000)/4200-273.15; ([.L29]-2100000)/4200-273.15)" office:value-type="float" office:value="234.000368260601" calcext:value-type="float">
            <text:p>234.00</text:p>
          </table:table-cell>
          <table:table-cell table:style-name="ce13" table:formula="of:=IF([.Q29]&lt;=0; 4200*LN(([.R29]+273.15)/273.15); IF([.Q29]&lt;1; 4200*LN(([.C29]+273.15)/273.15) + [.Q29]*(2100000/([.C29]+273.15)); 4200*LN(([.C29]+273.15)/273.15) + (2100000/([.C29]+273.15)) + 4200*LN(([.R29]+273.15)/([.C29]+273.15))))" office:value-type="float" office:value="7787.19610645764" calcext:value-type="float">
            <text:p>7787</text:p>
          </table:table-cell>
          <table:table-cell table:number-columns-repeated="16365"/>
        </table:table-row>
        <table:table-row table:style-name="ro1">
          <table:table-cell table:formula="of:=[.A$9]" office:value-type="string" office:string-value="LP Tap 2" calcext:value-type="string">
            <text:p>LP Tap 2</text:p>
          </table:table-cell>
          <table:table-cell office:value-type="float" office:value="2.5" calcext:value-type="float">
            <text:p>2.5</text:p>
          </table:table-cell>
          <table:table-cell table:formula="of:=SQRT(SQRT([.B30]))*100" office:value-type="float" office:value="125.743342968294" calcext:value-type="float">
            <text:p>125.74</text:p>
          </table:table-cell>
          <table:table-cell table:formula="of:=4200*([.C30]+273.15)" office:value-type="float" office:value="1675352.04046683" calcext:value-type="float">
            <text:p>1675352.04046683</text:p>
          </table:table-cell>
          <table:table-cell table:formula="of:=4200 * LN(([.C30] + 273.15) / 273.15)" office:value-type="float" office:value="1590.42649692283" calcext:value-type="float">
            <text:p>1590.42649692283</text:p>
          </table:table-cell>
          <table:table-cell table:formula="of:=[.E30] + (2100000 / ([.C30] + 273.15))" office:value-type="float" office:value="6854.99166708391" calcext:value-type="float">
            <text:p>6854.99166708391</text:p>
          </table:table-cell>
          <table:table-cell table:number-columns-repeated="4"/>
          <table:table-cell table:style-name="ce11" table:formula="of:=[.S30]" office:value-type="float" office:value="7572.01333538786" calcext:value-type="float">
            <text:p>7572</text:p>
          </table:table-cell>
          <table:table-cell table:formula="of:=[.P30]" office:value-type="float" office:value="4087232.09092391" calcext:value-type="float">
            <text:p>4,087,232</text:p>
          </table:table-cell>
          <table:table-cell table:style-name="ce43" table:formula="of:=[.R30]" office:value-type="float" office:value="200.000497839027" calcext:value-type="float">
            <text:p>200.00</text:p>
          </table:table-cell>
          <table:table-cell table:style-name="ce15" table:formula="of:=IF([.K29] &lt;= [.E30]; 4200 * 273.15 * EXP([.K29] / 4200); IF([.K29] &gt;= [.F30]; 4200 * ([.C30]+ 273.15) * EXP(([.K29] - [.F30]) / 4200) + 2100000; [.D30] + ([.C30] + 273.15) * ([.K29] - [.E30])))" office:value-type="float" office:value="4191699.20949467" calcext:value-type="float">
            <text:p>4,191,699</text:p>
          </table:table-cell>
          <table:table-cell table:style-name="ce7" office:value-type="float" office:value="3.7253" calcext:value-type="float">
            <text:p>3.7253</text:p>
          </table:table-cell>
          <table:table-cell table:style-name="ce2" table:formula="of:=[.L29]-[.O30]*([.L29]-[.N30])" office:value-type="float" office:value="4087232.09092391" calcext:value-type="float">
            <text:p>4,087,232</text:p>
          </table:table-cell>
          <table:table-cell table:style-name="ce36" table:formula="of:=([.L30]-([.C30]+273.15)*4200)/2100000" office:value-type="float" office:value="1.14851430974147" calcext:value-type="float">
            <text:p>1.149</text:p>
          </table:table-cell>
          <table:table-cell table:style-name="ce4" table:formula="of:=IF([.Q30] &lt;= 1; ([.L30]-[.Q30]*2100000)/4200-273.15; ([.L30]-2100000)/4200-273.15)" office:value-type="float" office:value="200.000497839027" calcext:value-type="float">
            <text:p>200.00</text:p>
          </table:table-cell>
          <table:table-cell table:style-name="ce13" table:formula="of:=IF([.Q30]&lt;=0; 4200*LN(([.R30]+273.15)/273.15); IF([.Q30]&lt;1; 4200*LN(([.C30]+273.15)/273.15) + [.Q30]*(2100000/([.C30]+273.15)); 4200*LN(([.C30]+273.15)/273.15) + (2100000/([.C30]+273.15)) + 4200*LN(([.R30]+273.15)/([.C30]+273.15))))" office:value-type="float" office:value="7572.01333538786" calcext:value-type="float">
            <text:p>7572</text:p>
          </table:table-cell>
          <table:table-cell table:number-columns-repeated="16365"/>
        </table:table-row>
        <table:table-row table:style-name="ro1">
          <table:table-cell table:formula="of:=[.A$10]" office:value-type="string" office:string-value="LP Tap 3" calcext:value-type="string">
            <text:p>LP Tap 3</text:p>
          </table:table-cell>
          <table:table-cell office:value-type="float" office:value="2" calcext:value-type="float">
            <text:p>2</text:p>
          </table:table-cell>
          <table:table-cell table:formula="of:=SQRT(SQRT([.B31]))*100" office:value-type="float" office:value="118.920711500272" calcext:value-type="float">
            <text:p>118.92</text:p>
          </table:table-cell>
          <table:table-cell table:formula="of:=4200*([.C31]+273.15)" office:value-type="float" office:value="1646696.98830114" calcext:value-type="float">
            <text:p>1646696.98830114</text:p>
          </table:table-cell>
          <table:table-cell table:formula="of:=4200 * LN(([.C31] + 273.15) / 273.15)" office:value-type="float" office:value="1517.96868367761" calcext:value-type="float">
            <text:p>1517.96868367761</text:p>
          </table:table-cell>
          <table:table-cell table:formula="of:=[.E31] + (2100000 / ([.C31] + 273.15))" office:value-type="float" office:value="6874.14535896223" calcext:value-type="float">
            <text:p>6874.14535896223</text:p>
          </table:table-cell>
          <table:table-cell table:number-columns-repeated="4"/>
          <table:table-cell table:style-name="ce11" table:formula="of:=[.S31]" office:value-type="float" office:value="7350.42319591412" calcext:value-type="float">
            <text:p>7350</text:p>
          </table:table-cell>
          <table:table-cell table:formula="of:=[.P31]" office:value-type="float" office:value="3944431.20741681" calcext:value-type="float">
            <text:p>3,944,431</text:p>
          </table:table-cell>
          <table:table-cell table:style-name="ce43" table:formula="of:=[.R31]" office:value-type="float" office:value="166.000287480192" calcext:value-type="float">
            <text:p>166.00</text:p>
          </table:table-cell>
          <table:table-cell table:style-name="ce15" table:formula="of:=IF([.K30] &lt;= [.E31]; 4200 * 273.15 * EXP([.K30] / 4200); IF([.K30] &gt;= [.F31]; 4200 * ([.C31]+ 273.15) * EXP(([.K30] - [.F31]) / 4200) + 2100000; [.D31] + ([.C31] + 273.15) * ([.K30] - [.E31])))" office:value-type="float" office:value="4044355.38066806" calcext:value-type="float">
            <text:p>4,044,355</text:p>
          </table:table-cell>
          <table:table-cell table:style-name="ce7" office:value-type="float" office:value="3.3305" calcext:value-type="float">
            <text:p>3.3305</text:p>
          </table:table-cell>
          <table:table-cell table:style-name="ce2" table:formula="of:=[.L30]-[.O31]*([.L30]-[.N31])" office:value-type="float" office:value="3944431.20741681" calcext:value-type="float">
            <text:p>3,944,431</text:p>
          </table:table-cell>
          <table:table-cell table:style-name="ce36" table:formula="of:=([.L31]-([.C31]+273.15)*4200)/2100000" office:value-type="float" office:value="1.09415915195984" calcext:value-type="float">
            <text:p>1.094</text:p>
          </table:table-cell>
          <table:table-cell table:style-name="ce4" table:formula="of:=IF([.Q31] &lt;= 1; ([.L31]-[.Q31]*2100000)/4200-273.15; ([.L31]-2100000)/4200-273.15)" office:value-type="float" office:value="166.000287480192" calcext:value-type="float">
            <text:p>166.00</text:p>
          </table:table-cell>
          <table:table-cell table:style-name="ce13" table:formula="of:=IF([.Q31]&lt;=0; 4200*LN(([.R31]+273.15)/273.15); IF([.Q31]&lt;1; 4200*LN(([.C31]+273.15)/273.15) + [.Q31]*(2100000/([.C31]+273.15)); 4200*LN(([.C31]+273.15)/273.15) + (2100000/([.C31]+273.15)) + 4200*LN(([.R31]+273.15)/([.C31]+273.15))))" office:value-type="float" office:value="7350.42319591412" calcext:value-type="float">
            <text:p>7350</text:p>
          </table:table-cell>
          <table:table-cell table:number-columns-repeated="16365"/>
        </table:table-row>
        <table:table-row table:style-name="ro1">
          <table:table-cell table:formula="of:=[.A$11]" office:value-type="string" office:string-value="LP Tap 4" calcext:value-type="string">
            <text:p>LP Tap 4</text:p>
          </table:table-cell>
          <table:table-cell office:value-type="float" office:value="1.5" calcext:value-type="float">
            <text:p>1.5</text:p>
          </table:table-cell>
          <table:table-cell table:formula="of:=SQRT(SQRT([.B32]))*100" office:value-type="float" office:value="110.668191970032" calcext:value-type="float">
            <text:p>110.67</text:p>
          </table:table-cell>
          <table:table-cell table:formula="of:=4200*([.C32]+273.15)" office:value-type="float" office:value="1612036.40627413" calcext:value-type="float">
            <text:p>1612036.40627413</text:p>
          </table:table-cell>
          <table:table-cell table:formula="of:=4200 * LN(([.C32] + 273.15) / 273.15)" office:value-type="float" office:value="1428.62112631477" calcext:value-type="float">
            <text:p>1428.62112631477</text:p>
          </table:table-cell>
          <table:table-cell table:formula="of:=[.E32] + (2100000 / ([.C32] + 273.15))" office:value-type="float" office:value="6899.96157847334" calcext:value-type="float">
            <text:p>6899.96157847334</text:p>
          </table:table-cell>
          <table:table-cell table:number-columns-repeated="4"/>
          <table:table-cell table:style-name="ce11" table:formula="of:=[.S32]" office:value-type="float" office:value="7137.48606238889" calcext:value-type="float">
            <text:p>7137</text:p>
          </table:table-cell>
          <table:table-cell table:formula="of:=[.P32]" office:value-type="float" office:value="3805829.79720051" calcext:value-type="float">
            <text:p>3,805,830</text:p>
          </table:table-cell>
          <table:table-cell table:style-name="ce43" table:formula="of:=[.R32]" office:value-type="float" office:value="132.999951714408" calcext:value-type="float">
            <text:p>133.00</text:p>
          </table:table-cell>
          <table:table-cell table:style-name="ce15" table:formula="of:=IF([.K31] &lt;= [.E32]; 4200 * 273.15 * EXP([.K31] / 4200); IF([.K31] &gt;= [.F32]; 4200 * ([.C32]+ 273.15) * EXP(([.K31] - [.F32]) / 4200) + 2100000; [.D32] + ([.C32] + 273.15) * ([.K31] - [.E32])))" office:value-type="float" office:value="3894544.07851917" calcext:value-type="float">
            <text:p>3,894,544</text:p>
          </table:table-cell>
          <table:table-cell table:style-name="ce7" office:value-type="float" office:value="2.7783" calcext:value-type="float">
            <text:p>2.7783</text:p>
          </table:table-cell>
          <table:table-cell table:style-name="ce2" table:formula="of:=[.L31]-[.O32]*([.L31]-[.N32])" office:value-type="float" office:value="3805829.79720051" calcext:value-type="float">
            <text:p>3,805,830</text:p>
          </table:table-cell>
          <table:table-cell table:style-name="ce36" table:formula="of:=([.L32]-([.C32]+273.15)*4200)/2100000" office:value-type="float" office:value="1.04466351948875" calcext:value-type="float">
            <text:p>1.045</text:p>
          </table:table-cell>
          <table:table-cell table:style-name="ce4" table:formula="of:=IF([.Q32] &lt;= 1; ([.L32]-[.Q32]*2100000)/4200-273.15; ([.L32]-2100000)/4200-273.15)" office:value-type="float" office:value="132.999951714408" calcext:value-type="float">
            <text:p>133.00</text:p>
          </table:table-cell>
          <table:table-cell table:style-name="ce13" table:formula="of:=IF([.Q32]&lt;=0; 4200*LN(([.R32]+273.15)/273.15); IF([.Q32]&lt;1; 4200*LN(([.C32]+273.15)/273.15) + [.Q32]*(2100000/([.C32]+273.15)); 4200*LN(([.C32]+273.15)/273.15) + (2100000/([.C32]+273.15)) + 4200*LN(([.R32]+273.15)/([.C32]+273.15))))" office:value-type="float" office:value="7137.48606238889" calcext:value-type="float">
            <text:p>7137</text:p>
          </table:table-cell>
          <table:table-cell table:number-columns-repeated="16365"/>
        </table:table-row>
        <table:table-row table:style-name="ro1">
          <table:table-cell table:formula="of:=[.A$12]" office:value-type="string" office:string-value="LP Out" calcext:value-type="string">
            <text:p>LP Out</text:p>
          </table:table-cell>
          <table:table-cell office:value-type="float" office:value="0.006147" calcext:value-type="float">
            <text:p>0.006147</text:p>
          </table:table-cell>
          <table:table-cell table:formula="of:=SQRT(SQRT([.B33]))*100" office:value-type="float" office:value="28.0005010798435" calcext:value-type="float">
            <text:p>28.00</text:p>
          </table:table-cell>
          <table:table-cell table:formula="of:=4200*([.C33]+273.15)" office:value-type="float" office:value="1264832.10453534" calcext:value-type="float">
            <text:p>1264832.10453534</text:p>
          </table:table-cell>
          <table:table-cell table:formula="of:=4200 * LN(([.C33] + 273.15) / 273.15)" office:value-type="float" office:value="409.874003845015" calcext:value-type="float">
            <text:p>409.874003845015</text:p>
          </table:table-cell>
          <table:table-cell table:formula="of:=[.E33] + (2100000 / ([.C33] + 273.15))" office:value-type="float" office:value="7383.13153610869" calcext:value-type="float">
            <text:p>7383.13153610869</text:p>
          </table:table-cell>
          <table:table-cell table:number-columns-repeated="4"/>
          <table:table-cell table:style-name="ce11" table:formula="of:=[.S33]" office:value-type="float" office:value="6685.86928024638" calcext:value-type="float">
            <text:p>6686</text:p>
          </table:table-cell>
          <table:table-cell table:formula="of:=[.P33]" office:value-type="float" office:value="3154851.22679834" calcext:value-type="float">
            <text:p>3,154,851</text:p>
          </table:table-cell>
          <table:table-cell table:style-name="ce43" table:formula="of:=[.R33]" office:value-type="float" office:value="28.0005010798435" calcext:value-type="float">
            <text:p>28.00</text:p>
          </table:table-cell>
          <table:table-cell table:style-name="ce15" table:formula="of:=IF([.K32] &lt;= [.E33]; 4200 * 273.15 * EXP([.K32] / 4200); IF([.K32] &gt;= [.F33]; 4200 * ([.C33]+ 273.15) * EXP(([.K32] - [.F33]) / 4200) + 2100000; [.D33] + ([.C33] + 273.15) * ([.K32] - [.E33])))" office:value-type="float" office:value="3290855.84703663" calcext:value-type="float">
            <text:p>3,290,856</text:p>
          </table:table-cell>
          <table:table-cell table:style-name="ce7" office:value-type="float" office:value="1.2641" calcext:value-type="float">
            <text:p>1.2641</text:p>
          </table:table-cell>
          <table:table-cell table:style-name="ce2" table:formula="of:=[.L32]-[.O33]*([.L32]-[.N33])" office:value-type="float" office:value="3154851.22679834" calcext:value-type="float">
            <text:p>3,154,851</text:p>
          </table:table-cell>
          <table:table-cell table:style-name="ce46" table:formula="of:=([.L33]-([.C33]+273.15)*4200)/2100000" office:value-type="float" office:value="0.900009105839525" calcext:value-type="float">
            <text:p>0.900</text:p>
          </table:table-cell>
          <table:table-cell table:style-name="ce4" table:formula="of:=IF([.Q33] &lt;= 1; ([.L33]-[.Q33]*2100000)/4200-273.15; ([.L33]-2100000)/4200-273.15)" office:value-type="float" office:value="28.0005010798435" calcext:value-type="float">
            <text:p>28.00</text:p>
          </table:table-cell>
          <table:table-cell table:style-name="ce13" table:formula="of:=IF([.Q33]&lt;=0; 4200*LN(([.R33]+273.15)/273.15); IF([.Q33]&lt;1; 4200*LN(([.C33]+273.15)/273.15) + [.Q33]*(2100000/([.C33]+273.15)); 4200*LN(([.C33]+273.15)/273.15) + (2100000/([.C33]+273.15)) + 4200*LN(([.R33]+273.15)/([.C33]+273.15))))" office:value-type="float" office:value="6685.86928024638" calcext:value-type="float">
            <text:p>6686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office:value-type="string" calcext:value-type="string" table:number-columns-spanned="19" table:number-rows-spanned="1">
            <text:p>While the above values are a validation of the calculation (it recalculates the given values with the procedure used in the model), values below are values for different load points.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7"/>
          <table:table-cell table:number-columns-repeated="1636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50 % Load with full reactor pressur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office:value-type="string" calcext:value-type="string">
            <text:p>Valve Drop</text:p>
          </table:table-cell>
          <table:table-cell table:style-name="ce21" office:value-type="percentage" office:value="0.5" calcext:value-type="percentage">
            <text:p>50 %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table:formula="of:=[.A$3]" office:value-type="string" office:string-value="Drum Out" calcext:value-type="string">
            <text:p>Drum Out</text:p>
          </table:table-cell>
          <table:table-cell table:style-name="ce16" office:value-type="float" office:value="65" calcext:value-type="float">
            <text:p>65</text:p>
          </table:table-cell>
          <table:table-cell table:formula="of:=SQRT(SQRT([.B39]))*100" office:value-type="float" office:value="283.941151443368" calcext:value-type="float">
            <text:p>283.94</text:p>
          </table:table-cell>
          <table:table-cell table:formula="of:=4200*([.C39]+273.15)" office:value-type="float" office:value="2339782.83606215" calcext:value-type="float">
            <text:p>2339782.83606215</text:p>
          </table:table-cell>
          <table:table-cell table:formula="of:=4200 * LN(([.C39] + 273.15) / 273.15)" office:value-type="float" office:value="2993.37267101204" calcext:value-type="float">
            <text:p>2993.37267101204</text:p>
          </table:table-cell>
          <table:table-cell table:formula="of:=[.E39] + (2100000 / ([.C39] + 273.15))" office:value-type="float" office:value="6762.95327655408" calcext:value-type="float">
            <text:p>6762.95327655408</text:p>
          </table:table-cell>
          <table:table-cell table:style-name="ce4" table:formula="of:=SQRT(SQRT([.B39]))*100" office:value-type="float" office:value="283.941151443368" calcext:value-type="float">
            <text:p>283.94</text:p>
          </table:table-cell>
          <table:table-cell table:formula="of:=([.G39]+273.15)*4200+2100000" office:value-type="float" office:value="4439782.83606214" calcext:value-type="float">
            <text:p>4439783</text:p>
          </table:table-cell>
          <table:table-cell table:style-name="ce7" table:formula="of:=([.H39]-([.C39]+273.15)*4200)/2100000" office:value-type="float" office:value="1" calcext:value-type="float">
            <text:p>1.0000</text:p>
          </table:table-cell>
          <table:table-cell table:formula="of:=IF([.I39]&lt;=0; 4200*LN(([.G39]+273.15)/273.15); IF([.I39]&lt;1; 4200*LN(([.C39]+273.15)/273.15) + [.I39]*(2100000/([.C39]+273.15)); 4200*LN(([.C39]+273.15)/273.15) + (2100000/([.C39]+273.15)) + 4200*LN(([.G39]+273.15)/([.C39]+273.15))))" office:value-type="float" office:value="6762.95327655408" calcext:value-type="float">
            <text:p>6763</text:p>
          </table:table-cell>
          <table:table-cell table:style-name="ce11"/>
          <table:table-cell/>
          <table:table-cell table:style-name="ce4"/>
          <table:table-cell table:style-name="ce2"/>
          <table:table-cell table:style-name="ce7"/>
          <table:table-cell table:style-name="ce2"/>
          <table:table-cell/>
          <table:table-cell table:style-name="ce4"/>
          <table:table-cell table:number-columns-repeated="16366"/>
        </table:table-row>
        <table:table-row table:style-name="ro1">
          <table:table-cell table:formula="of:=[.A$4]" office:value-type="string" office:string-value="HP In" calcext:value-type="string">
            <text:p>HP In</text:p>
          </table:table-cell>
          <table:table-cell table:style-name="ce19" table:formula="of:=[.B39]*[.B38]" office:value-type="float" office:value="32.5" calcext:value-type="float">
            <text:p>32.5</text:p>
          </table:table-cell>
          <table:table-cell table:formula="of:=SQRT(SQRT([.B40]))*100" office:value-type="float" office:value="238.76509639174" calcext:value-type="float">
            <text:p>238.77</text:p>
          </table:table-cell>
          <table:table-cell table:formula="of:=4200*([.C40]+273.15)" office:value-type="float" office:value="2150043.40484531" calcext:value-type="float">
            <text:p>2150043.40484531</text:p>
          </table:table-cell>
          <table:table-cell table:formula="of:=4200 * LN(([.C40] + 273.15) / 273.15)" office:value-type="float" office:value="2638.17829416549" calcext:value-type="float">
            <text:p>2638.17829416549</text:p>
          </table:table-cell>
          <table:table-cell table:formula="of:=[.E40] + (2100000 / ([.C40] + 273.15))" office:value-type="float" office:value="6740.42105825266" calcext:value-type="float">
            <text:p>6740.42105825266</text:p>
          </table:table-cell>
          <table:table-cell table:style-name="ce4" table:formula="of:=[.G39]" office:value-type="float" office:value="283.941151443368" calcext:value-type="float">
            <text:p>283.94</text:p>
          </table:table-cell>
          <table:table-cell table:formula="of:=([.G40]+273.15)*4200+2100000" office:value-type="float" office:value="4439782.83606214" calcext:value-type="float">
            <text:p>4439783</text:p>
          </table:table-cell>
          <table:table-cell table:style-name="ce7" table:formula="of:=([.H40]-([.C40]+273.15)*4200)/2100000" office:value-type="float" office:value="1.09035211010326" calcext:value-type="float">
            <text:p>1.0904</text:p>
          </table:table-cell>
          <table:table-cell table:formula="of:=IF([.I40]&lt;=0; 4200*LN(([.G40]+273.15)/273.15); IF([.I40]&lt;1; 4200*LN(([.C40]+273.15)/273.15) + [.I40]*(2100000/([.C40]+273.15)); 4200*LN(([.C40]+273.15)/273.15) + (2100000/([.C40]+273.15)) + 4200*LN(([.G40]+273.15)/([.C40]+273.15))))" office:value-type="float" office:value="7095.61543509921" calcext:value-type="float">
            <text:p>7096</text:p>
          </table:table-cell>
          <table:table-cell table:style-name="ce11" table:formula="of:=[.J40]" office:value-type="float" office:value="7095.61543509921" calcext:value-type="float">
            <text:p>7096</text:p>
          </table:table-cell>
          <table:table-cell table:formula="of:=[.H40]" office:value-type="float" office:value="4439782.83606214" calcext:value-type="float">
            <text:p>4,439,783</text:p>
          </table:table-cell>
          <table:table-cell table:style-name="ce43" table:formula="of:=[.G40]" office:value-type="float" office:value="283.941151443368" calcext:value-type="float">
            <text:p>283.94</text:p>
          </table:table-cell>
          <table:table-cell table:style-name="ce2"/>
          <table:table-cell table:style-name="ce7"/>
          <table:table-cell table:style-name="ce2"/>
          <table:table-cell/>
          <table:table-cell table:style-name="ce4"/>
          <table:table-cell table:number-columns-repeated="16366"/>
        </table:table-row>
        <table:table-row table:style-name="ro1">
          <table:table-cell table:formula="of:=[.A$5]" office:value-type="string" office:string-value="HP Mid" calcext:value-type="string">
            <text:p>HP Mid</text:p>
          </table:table-cell>
          <table:table-cell table:formula="of:=[.B$40]*[.M5]" office:value-type="float" office:value="5.25" calcext:value-type="float">
            <text:p>5.25</text:p>
          </table:table-cell>
          <table:table-cell table:formula="of:=SQRT(SQRT([.B41]))*100" office:value-type="float" office:value="151.370005201755" calcext:value-type="float">
            <text:p>151.37</text:p>
          </table:table-cell>
          <table:table-cell table:formula="of:=4200*([.C41]+273.15)" office:value-type="float" office:value="1782984.02184737" calcext:value-type="float">
            <text:p>1782984.02184737</text:p>
          </table:table-cell>
          <table:table-cell table:formula="of:=4200 * LN(([.C41] + 273.15) / 273.15)" office:value-type="float" office:value="1851.93975248166" calcext:value-type="float">
            <text:p>1851.93975248166</text:p>
          </table:table-cell>
          <table:table-cell table:formula="of:=[.E41] + (2100000 / ([.C41] + 273.15))" office:value-type="float" office:value="6798.70309524089" calcext:value-type="float">
            <text:p>6798.70309524089</text:p>
          </table:table-cell>
          <table:table-cell table:number-columns-repeated="2"/>
          <table:table-cell table:style-name="ce7"/>
          <table:table-cell/>
          <table:table-cell table:style-name="ce14" table:formula="of:=[.S41]" office:value-type="float" office:value="7092.43381590628" calcext:value-type="float">
            <text:p>7092</text:p>
          </table:table-cell>
          <table:table-cell table:formula="of:=[.P41]" office:value-type="float" office:value="4012142.35120862" calcext:value-type="float">
            <text:p>4,012,142</text:p>
          </table:table-cell>
          <table:table-cell table:style-name="ce43" table:formula="of:=[.R41]" office:value-type="float" office:value="182.121988383005" calcext:value-type="float">
            <text:p>182.12</text:p>
          </table:table-cell>
          <table:table-cell table:style-name="ce15" table:formula="of:=IF([.K40] &lt;= [.E41]; 4200 * 273.15 * EXP([.K40] / 4200); IF([.K40] &gt;= [.F41]; 4200 * ([.C41]+ 273.15) * EXP(([.K40] - [.F41]) / 4200) + 2100000; [.D41] + ([.C41] + 273.15) * ([.K40] - [.E41])))" office:value-type="float" office:value="4013591.40208415" calcext:value-type="float">
            <text:p>4,013,591</text:p>
          </table:table-cell>
          <table:table-cell table:style-name="ce7" office:value-type="float" office:value="1.0034" calcext:value-type="float">
            <text:p>1.0034</text:p>
          </table:table-cell>
          <table:table-cell table:style-name="ce2" table:formula="of:=[.L40]-[.O41]*([.L40]-[.N41])" office:value-type="float" office:value="4012142.35120862" calcext:value-type="float">
            <text:p>4,012,142</text:p>
          </table:table-cell>
          <table:table-cell table:style-name="ce36" table:formula="of:=([.L41]-([.C41]+273.15)*4200)/2100000" office:value-type="float" office:value="1.0615039663625" calcext:value-type="float">
            <text:p>1.062</text:p>
          </table:table-cell>
          <table:table-cell table:style-name="ce4" table:formula="of:=IF([.Q41] &lt;= 1; ([.L41]-[.Q41]*2100000)/4200-273.15; ([.L41]-2100000)/4200-273.15)" office:value-type="float" office:value="182.121988383005" calcext:value-type="float">
            <text:p>182.12</text:p>
          </table:table-cell>
          <table:table-cell table:style-name="ce13" table:formula="of:=IF([.Q41]&lt;=0; 4200*LN(([.R41]+273.15)/273.15); IF([.Q41]&lt;1; 4200*LN(([.C41]+273.15)/273.15) + [.Q41]*(2100000/([.C41]+273.15)); 4200*LN(([.C41]+273.15)/273.15) + (2100000/([.C41]+273.15)) + 4200*LN(([.R41]+273.15)/([.C41]+273.15))))" office:value-type="float" office:value="7092.43381590628" calcext:value-type="float">
            <text:p>7092</text:p>
          </table:table-cell>
          <table:table-cell table:number-columns-repeated="16365"/>
        </table:table-row>
        <table:table-row table:style-name="ro1">
          <table:table-cell table:formula="of:=[.A$6]" office:value-type="string" office:string-value="HP Out" calcext:value-type="string">
            <text:p>HP Out</text:p>
          </table:table-cell>
          <table:table-cell table:formula="of:=[.B$40]*[.M6]" office:value-type="float" office:value="1.75" calcext:value-type="float">
            <text:p>1.75</text:p>
          </table:table-cell>
          <table:table-cell table:formula="of:=SQRT(SQRT([.B42]))*100" office:value-type="float" office:value="115.01633168956" calcext:value-type="float">
            <text:p>115.02</text:p>
          </table:table-cell>
          <table:table-cell table:formula="of:=4200*([.C42]+273.15)" office:value-type="float" office:value="1630298.59309615" calcext:value-type="float">
            <text:p>1630298.59309615</text:p>
          </table:table-cell>
          <table:table-cell table:formula="of:=4200 * LN(([.C42] + 273.15) / 273.15)" office:value-type="float" office:value="1475.93393993565" calcext:value-type="float">
            <text:p>1475.93393993565</text:p>
          </table:table-cell>
          <table:table-cell table:formula="of:=[.E42] + (2100000 / ([.C42] + 273.15))" office:value-type="float" office:value="6885.985839232" calcext:value-type="float">
            <text:p>6885.985839232</text:p>
          </table:table-cell>
          <table:table-cell table:number-columns-repeated="2"/>
          <table:table-cell table:style-name="ce7"/>
          <table:table-cell/>
          <table:table-cell table:style-name="ce11" table:formula="of:=[.S42]" office:value-type="float" office:value="6383.69370850355" calcext:value-type="float">
            <text:p>6384</text:p>
          </table:table-cell>
          <table:table-cell table:formula="of:=[.P42]" office:value-type="float" office:value="3535325.69927476" calcext:value-type="float">
            <text:p>3,535,326</text:p>
          </table:table-cell>
          <table:table-cell table:style-name="ce43" table:formula="of:=[.R42]" office:value-type="float" office:value="115.01633168956" calcext:value-type="float">
            <text:p>115.02</text:p>
          </table:table-cell>
          <table:table-cell table:style-name="ce15" table:formula="of:=IF([.K41] &lt;= [.E42]; 4200 * 273.15 * EXP([.K41] / 4200); IF([.K41] &gt;= [.F42]; 4200 * ([.C42]+ 273.15) * EXP(([.K41] - [.F42]) / 4200) + 2100000; [.D42] + ([.C42] + 273.15) * ([.K41] - [.E42])))" office:value-type="float" office:value="3812436.93491868" calcext:value-type="float">
            <text:p>3,812,437</text:p>
          </table:table-cell>
          <table:table-cell table:style-name="ce7" office:value-type="float" office:value="2.3876" calcext:value-type="float">
            <text:p>2.3876</text:p>
          </table:table-cell>
          <table:table-cell table:style-name="ce2" table:formula="of:=[.L41]-[.O42]*([.L41]-[.N42])" office:value-type="float" office:value="3535325.69927476" calcext:value-type="float">
            <text:p>3,535,326</text:p>
          </table:table-cell>
          <table:table-cell table:style-name="ce46" table:formula="of:=([.L42]-([.C42]+273.15)*4200)/2100000" office:value-type="float" office:value="0.907155764846955" calcext:value-type="float">
            <text:p>0.907</text:p>
          </table:table-cell>
          <table:table-cell table:style-name="ce4" table:formula="of:=IF([.Q42] &lt;= 1; ([.L42]-[.Q42]*2100000)/4200-273.15; ([.L42]-2100000)/4200-273.15)" office:value-type="float" office:value="115.01633168956" calcext:value-type="float">
            <text:p>115.02</text:p>
          </table:table-cell>
          <table:table-cell table:style-name="ce13" table:formula="of:=IF([.Q42]&lt;=0; 4200*LN(([.R42]+273.15)/273.15); IF([.Q42]&lt;1; 4200*LN(([.C42]+273.15)/273.15) + [.Q42]*(2100000/([.C42]+273.15)); 4200*LN(([.C42]+273.15)/273.15) + (2100000/([.C42]+273.15)) + 4200*LN(([.R42]+273.15)/([.C42]+273.15))))" office:value-type="float" office:value="6383.69370850355" calcext:value-type="float">
            <text:p>6384</text:p>
          </table:table-cell>
          <table:table-cell table:number-columns-repeated="16365"/>
        </table:table-row>
        <table:table-row table:style-name="ro1">
          <table:table-cell table:formula="of:=[.A$7]" office:value-type="string" office:string-value="LP In" calcext:value-type="string">
            <text:p>LP In</text:p>
          </table:table-cell>
          <table:table-cell table:formula="of:=[.B$40]*[.M7]" office:value-type="float" office:value="1.75" calcext:value-type="float">
            <text:p>1.75</text:p>
          </table:table-cell>
          <table:table-cell table:formula="of:=SQRT(SQRT([.B43]))*100" office:value-type="float" office:value="115.01633168956" calcext:value-type="float">
            <text:p>115.02</text:p>
          </table:table-cell>
          <table:table-cell table:formula="of:=4200*([.C43]+273.15)" office:value-type="float" office:value="1630298.59309615" calcext:value-type="float">
            <text:p>1630298.59309615</text:p>
          </table:table-cell>
          <table:table-cell table:formula="of:=4200 * LN(([.C43] + 273.15) / 273.15)" office:value-type="float" office:value="1475.93393993565" calcext:value-type="float">
            <text:p>1475.93393993565</text:p>
          </table:table-cell>
          <table:table-cell table:formula="of:=[.E43] + (2100000 / ([.C43] + 273.15))" office:value-type="float" office:value="6885.985839232" calcext:value-type="float">
            <text:p>6885.985839232</text:p>
          </table:table-cell>
          <table:table-cell table:style-name="ce16" office:value-type="float" office:value="263" calcext:value-type="float">
            <text:p>263</text:p>
          </table:table-cell>
          <table:table-cell table:formula="of:=([.G43]+273.15)*4200+2100000" office:value-type="float" office:value="4351830" calcext:value-type="float">
            <text:p>4351830</text:p>
          </table:table-cell>
          <table:table-cell table:style-name="ce7" table:formula="of:=([.H43]-([.C43]+273.15)*4200)/2100000" office:value-type="float" office:value="1.29596733662088" calcext:value-type="float">
            <text:p>1.2960</text:p>
          </table:table-cell>
          <table:table-cell table:formula="of:=IF([.I43]&lt;=0; 4200*LN(([.G43]+273.15)/273.15); IF([.I43]&lt;1; 4200*LN(([.C43]+273.15)/273.15) + [.I43]*(2100000/([.C43]+273.15)); 4200*LN(([.C43]+273.15)/273.15) + (2100000/([.C43]+273.15)) + 4200*LN(([.G43]+273.15)/([.C43]+273.15))))" office:value-type="float" office:value="8242.50198615894" calcext:value-type="float">
            <text:p>8243</text:p>
          </table:table-cell>
          <table:table-cell table:style-name="ce11" table:formula="of:=[.J43]" office:value-type="float" office:value="8242.50198615894" calcext:value-type="float">
            <text:p>8243</text:p>
          </table:table-cell>
          <table:table-cell table:formula="of:=[.H43]" office:value-type="float" office:value="4351830" calcext:value-type="float">
            <text:p>4,351,830</text:p>
          </table:table-cell>
          <table:table-cell table:style-name="ce43" table:formula="of:=[.G43]" office:value-type="float" office:value="263" calcext:value-type="float">
            <text:p>263.00</text:p>
          </table:table-cell>
          <table:table-cell/>
          <table:table-cell table:style-name="ce7"/>
          <table:table-cell/>
          <table:table-cell table:style-name="ce36"/>
          <table:table-cell table:style-name="ce4"/>
          <table:table-cell table:style-name="ce13"/>
          <table:table-cell table:number-columns-repeated="16365"/>
        </table:table-row>
        <table:table-row table:style-name="ro1">
          <table:table-cell table:formula="of:=[.A$8]" office:value-type="string" office:string-value="LP Tap 1" calcext:value-type="string">
            <text:p>LP Tap 1</text:p>
          </table:table-cell>
          <table:table-cell table:formula="of:=[.B$40]*[.M8]" office:value-type="float" office:value="1.5" calcext:value-type="float">
            <text:p>1.5</text:p>
          </table:table-cell>
          <table:table-cell table:formula="of:=SQRT(SQRT([.B44]))*100" office:value-type="float" office:value="110.668191970032" calcext:value-type="float">
            <text:p>110.67</text:p>
          </table:table-cell>
          <table:table-cell table:formula="of:=4200*([.C44]+273.15)" office:value-type="float" office:value="1612036.40627413" calcext:value-type="float">
            <text:p>1612036.40627413</text:p>
          </table:table-cell>
          <table:table-cell table:formula="of:=4200 * LN(([.C44] + 273.15) / 273.15)" office:value-type="float" office:value="1428.62112631477" calcext:value-type="float">
            <text:p>1428.62112631477</text:p>
          </table:table-cell>
          <table:table-cell table:formula="of:=[.E44] + (2100000 / ([.C44] + 273.15))" office:value-type="float" office:value="6899.96157847334" calcext:value-type="float">
            <text:p>6899.96157847334</text:p>
          </table:table-cell>
          <table:table-cell table:number-columns-repeated="4"/>
          <table:table-cell table:style-name="ce11" table:formula="of:=[.S44]" office:value-type="float" office:value="8085.35871896076" calcext:value-type="float">
            <text:p>8085</text:p>
          </table:table-cell>
          <table:table-cell table:formula="of:=[.P44]" office:value-type="float" office:value="4237711.02642481" calcext:value-type="float">
            <text:p>4,237,711</text:p>
          </table:table-cell>
          <table:table-cell table:style-name="ce43" table:formula="of:=[.R44]" office:value-type="float" office:value="235.828815815431" calcext:value-type="float">
            <text:p>235.83</text:p>
          </table:table-cell>
          <table:table-cell table:style-name="ce15" table:formula="of:=IF([.K43] &lt;= [.E44]; 4200 * 273.15 * EXP([.K43] / 4200); IF([.K43] &gt;= [.F44]; 4200 * ([.C44]+ 273.15) * EXP(([.K43] - [.F44]) / 4200) + 2100000; [.D44] + ([.C44] + 273.15) * ([.K43] - [.E44])))" office:value-type="float" office:value="4319208.73436378" calcext:value-type="float">
            <text:p>4,319,209</text:p>
          </table:table-cell>
          <table:table-cell table:style-name="ce7" office:value-type="float" office:value="3.4983" calcext:value-type="float">
            <text:p>3.4983</text:p>
          </table:table-cell>
          <table:table-cell table:style-name="ce2" table:formula="of:=[.L43]-[.O44]*([.L43]-[.N44])" office:value-type="float" office:value="4237711.02642481" calcext:value-type="float">
            <text:p>4,237,711</text:p>
          </table:table-cell>
          <table:table-cell table:style-name="ce36" table:formula="of:=([.L44]-([.C44]+273.15)*4200)/2100000" office:value-type="float" office:value="1.2503212476908" calcext:value-type="float">
            <text:p>1.250</text:p>
          </table:table-cell>
          <table:table-cell table:style-name="ce4" table:formula="of:=IF([.Q44] &lt;= 1; ([.L44]-[.Q44]*2100000)/4200-273.15; ([.L44]-2100000)/4200-273.15)" office:value-type="float" office:value="235.828815815431" calcext:value-type="float">
            <text:p>235.83</text:p>
          </table:table-cell>
          <table:table-cell table:style-name="ce13" table:formula="of:=IF([.Q44]&lt;=0; 4200*LN(([.R44]+273.15)/273.15); IF([.Q44]&lt;1; 4200*LN(([.C44]+273.15)/273.15) + [.Q44]*(2100000/([.C44]+273.15)); 4200*LN(([.C44]+273.15)/273.15) + (2100000/([.C44]+273.15)) + 4200*LN(([.R44]+273.15)/([.C44]+273.15))))" office:value-type="float" office:value="8085.35871896076" calcext:value-type="float">
            <text:p>8085</text:p>
          </table:table-cell>
          <table:table-cell table:number-columns-repeated="16365"/>
        </table:table-row>
        <table:table-row table:style-name="ro1">
          <table:table-cell table:formula="of:=[.A$9]" office:value-type="string" office:string-value="LP Tap 2" calcext:value-type="string">
            <text:p>LP Tap 2</text:p>
          </table:table-cell>
          <table:table-cell table:formula="of:=[.B$40]*[.M9]" office:value-type="float" office:value="1.25" calcext:value-type="float">
            <text:p>1.25</text:p>
          </table:table-cell>
          <table:table-cell table:formula="of:=SQRT(SQRT([.B45]))*100" office:value-type="float" office:value="105.737126344056" calcext:value-type="float">
            <text:p>105.74</text:p>
          </table:table-cell>
          <table:table-cell table:formula="of:=4200*([.C45]+273.15)" office:value-type="float" office:value="1591325.93064504" calcext:value-type="float">
            <text:p>1591325.93064504</text:p>
          </table:table-cell>
          <table:table-cell table:formula="of:=4200 * LN(([.C45] + 273.15) / 273.15)" office:value-type="float" office:value="1374.31243408594" calcext:value-type="float">
            <text:p>1374.31243408594</text:p>
          </table:table-cell>
          <table:table-cell table:formula="of:=[.E45] + (2100000 / ([.C45] + 273.15))" office:value-type="float" office:value="6916.86021147612" calcext:value-type="float">
            <text:p>6916.86021147612</text:p>
          </table:table-cell>
          <table:table-cell table:number-columns-repeated="4"/>
          <table:table-cell table:style-name="ce11" table:formula="of:=[.S45]" office:value-type="float" office:value="7884.93610571105" calcext:value-type="float">
            <text:p>7885</text:p>
          </table:table-cell>
          <table:table-cell table:formula="of:=[.P45]" office:value-type="float" office:value="4103833.00295587" calcext:value-type="float">
            <text:p>4,103,833</text:p>
          </table:table-cell>
          <table:table-cell table:style-name="ce43" table:formula="of:=[.R45]" office:value-type="float" office:value="203.953095941874" calcext:value-type="float">
            <text:p>203.95</text:p>
          </table:table-cell>
          <table:table-cell table:style-name="ce15" table:formula="of:=IF([.K44] &lt;= [.E45]; 4200 * 273.15 * EXP([.K44] / 4200); IF([.K44] &gt;= [.F45]; 4200 * ([.C45]+ 273.15) * EXP(([.K44] - [.F45]) / 4200) + 2100000; [.D45] + ([.C45] + 273.15) * ([.K44] - [.E45])))" office:value-type="float" office:value="4201773.51173635" calcext:value-type="float">
            <text:p>4,201,774</text:p>
          </table:table-cell>
          <table:table-cell table:style-name="ce7" office:value-type="float" office:value="3.7253" calcext:value-type="float">
            <text:p>3.7253</text:p>
          </table:table-cell>
          <table:table-cell table:style-name="ce2" table:formula="of:=[.L44]-[.O45]*([.L44]-[.N45])" office:value-type="float" office:value="4103833.00295587" calcext:value-type="float">
            <text:p>4,103,833</text:p>
          </table:table-cell>
          <table:table-cell table:style-name="ce36" table:formula="of:=([.L45]-([.C45]+273.15)*4200)/2100000" office:value-type="float" office:value="1.19643193919564" calcext:value-type="float">
            <text:p>1.196</text:p>
          </table:table-cell>
          <table:table-cell table:style-name="ce4" table:formula="of:=IF([.Q45] &lt;= 1; ([.L45]-[.Q45]*2100000)/4200-273.15; ([.L45]-2100000)/4200-273.15)" office:value-type="float" office:value="203.953095941874" calcext:value-type="float">
            <text:p>203.95</text:p>
          </table:table-cell>
          <table:table-cell table:style-name="ce13" table:formula="of:=IF([.Q45]&lt;=0; 4200*LN(([.R45]+273.15)/273.15); IF([.Q45]&lt;1; 4200*LN(([.C45]+273.15)/273.15) + [.Q45]*(2100000/([.C45]+273.15)); 4200*LN(([.C45]+273.15)/273.15) + (2100000/([.C45]+273.15)) + 4200*LN(([.R45]+273.15)/([.C45]+273.15))))" office:value-type="float" office:value="7884.93610571105" calcext:value-type="float">
            <text:p>7885</text:p>
          </table:table-cell>
          <table:table-cell table:number-columns-repeated="16365"/>
        </table:table-row>
        <table:table-row table:style-name="ro1">
          <table:table-cell table:formula="of:=[.A$10]" office:value-type="string" office:string-value="LP Tap 3" calcext:value-type="string">
            <text:p>LP Tap 3</text:p>
          </table:table-cell>
          <table:table-cell table:formula="of:=[.B$40]*[.M10]" office:value-type="float" office:value="1" calcext:value-type="float">
            <text:p>1</text:p>
          </table:table-cell>
          <table:table-cell table:formula="of:=SQRT(SQRT([.B46]))*100" office:value-type="float" office:value="100" calcext:value-type="float">
            <text:p>100.00</text:p>
          </table:table-cell>
          <table:table-cell table:formula="of:=4200*([.C46]+273.15)" office:value-type="float" office:value="1567230" calcext:value-type="float">
            <text:p>1567230</text:p>
          </table:table-cell>
          <table:table-cell table:formula="of:=4200 * LN(([.C46] + 273.15) / 273.15)" office:value-type="float" office:value="1310.22943268981" calcext:value-type="float">
            <text:p>1310.22943268981</text:p>
          </table:table-cell>
          <table:table-cell table:formula="of:=[.E46] + (2100000 / ([.C46] + 273.15))" office:value-type="float" office:value="6937.99306661719" calcext:value-type="float">
            <text:p>6937.99306661719</text:p>
          </table:table-cell>
          <table:table-cell table:number-columns-repeated="4"/>
          <table:table-cell table:style-name="ce11" table:formula="of:=[.S46]" office:value-type="float" office:value="7679.36221757063" calcext:value-type="float">
            <text:p>7679</text:p>
          </table:table-cell>
          <table:table-cell table:formula="of:=[.P46]" office:value-type="float" office:value="3969790.1295804" calcext:value-type="float">
            <text:p>3,969,790</text:p>
          </table:table-cell>
          <table:table-cell table:style-name="ce43" table:formula="of:=[.R46]" office:value-type="float" office:value="172.038126090571" calcext:value-type="float">
            <text:p>172.04</text:p>
          </table:table-cell>
          <table:table-cell table:style-name="ce15" table:formula="of:=IF([.K45] &lt;= [.E46]; 4200 * 273.15 * EXP([.K45] / 4200); IF([.K45] &gt;= [.F46]; 4200 * ([.C46]+ 273.15) * EXP(([.K45] - [.F46]) / 4200) + 2100000; [.D46] + ([.C46] + 273.15) * ([.K45] - [.E46])))" office:value-type="float" office:value="4063585.93093201" calcext:value-type="float">
            <text:p>4,063,586</text:p>
          </table:table-cell>
          <table:table-cell table:style-name="ce7" office:value-type="float" office:value="3.3305" calcext:value-type="float">
            <text:p>3.3305</text:p>
          </table:table-cell>
          <table:table-cell table:style-name="ce2" table:formula="of:=[.L45]-[.O46]*([.L45]-[.N46])" office:value-type="float" office:value="3969790.1295804" calcext:value-type="float">
            <text:p>3,969,790</text:p>
          </table:table-cell>
          <table:table-cell table:style-name="ce36" table:formula="of:=([.L46]-([.C46]+273.15)*4200)/2100000" office:value-type="float" office:value="1.14407625218114" calcext:value-type="float">
            <text:p>1.144</text:p>
          </table:table-cell>
          <table:table-cell table:style-name="ce4" table:formula="of:=IF([.Q46] &lt;= 1; ([.L46]-[.Q46]*2100000)/4200-273.15; ([.L46]-2100000)/4200-273.15)" office:value-type="float" office:value="172.038126090571" calcext:value-type="float">
            <text:p>172.04</text:p>
          </table:table-cell>
          <table:table-cell table:style-name="ce13" table:formula="of:=IF([.Q46]&lt;=0; 4200*LN(([.R46]+273.15)/273.15); IF([.Q46]&lt;1; 4200*LN(([.C46]+273.15)/273.15) + [.Q46]*(2100000/([.C46]+273.15)); 4200*LN(([.C46]+273.15)/273.15) + (2100000/([.C46]+273.15)) + 4200*LN(([.R46]+273.15)/([.C46]+273.15))))" office:value-type="float" office:value="7679.36221757063" calcext:value-type="float">
            <text:p>7679</text:p>
          </table:table-cell>
          <table:table-cell table:number-columns-repeated="16365"/>
        </table:table-row>
        <table:table-row table:style-name="ro1">
          <table:table-cell table:formula="of:=[.A$11]" office:value-type="string" office:string-value="LP Tap 4" calcext:value-type="string">
            <text:p>LP Tap 4</text:p>
          </table:table-cell>
          <table:table-cell table:formula="of:=[.B$40]*[.M11]" office:value-type="float" office:value="0.75" calcext:value-type="float">
            <text:p>0.75</text:p>
          </table:table-cell>
          <table:table-cell table:formula="of:=SQRT(SQRT([.B47]))*100" office:value-type="float" office:value="93.06048591021" calcext:value-type="float">
            <text:p>93.06</text:p>
          </table:table-cell>
          <table:table-cell table:formula="of:=4200*([.C47]+273.15)" office:value-type="float" office:value="1538084.04082288" calcext:value-type="float">
            <text:p>1538084.04082288</text:p>
          </table:table-cell>
          <table:table-cell table:formula="of:=4200 * LN(([.C47] + 273.15) / 273.15)" office:value-type="float" office:value="1231.38611975157" calcext:value-type="float">
            <text:p>1231.38611975157</text:p>
          </table:table-cell>
          <table:table-cell table:formula="of:=[.E47] + (2100000 / ([.C47] + 273.15))" office:value-type="float" office:value="6965.79319108511" calcext:value-type="float">
            <text:p>6965.79319108511</text:p>
          </table:table-cell>
          <table:table-cell table:number-columns-repeated="4"/>
          <table:table-cell table:style-name="ce11" table:formula="of:=[.S47]" office:value-type="float" office:value="7482.75949431764" calcext:value-type="float">
            <text:p>7483</text:p>
          </table:table-cell>
          <table:table-cell table:formula="of:=[.P47]" office:value-type="float" office:value="3839546.98794571" calcext:value-type="float">
            <text:p>3,839,547</text:p>
          </table:table-cell>
          <table:table-cell table:style-name="ce43" table:formula="of:=[.R47]" office:value-type="float" office:value="141.027854272789" calcext:value-type="float">
            <text:p>141.03</text:p>
          </table:table-cell>
          <table:table-cell table:style-name="ce15" table:formula="of:=IF([.K46] &lt;= [.E47]; 4200 * 273.15 * EXP([.K46] / 4200); IF([.K46] &gt;= [.F47]; 4200 * ([.C47]+ 273.15) * EXP(([.K46] - [.F47]) / 4200) + 2100000; [.D47] + ([.C47] + 273.15) * ([.K46] - [.E47])))" office:value-type="float" office:value="3922911.41179085" calcext:value-type="float">
            <text:p>3,922,911</text:p>
          </table:table-cell>
          <table:table-cell table:style-name="ce7" office:value-type="float" office:value="2.7783" calcext:value-type="float">
            <text:p>2.7783</text:p>
          </table:table-cell>
          <table:table-cell table:style-name="ce2" table:formula="of:=[.L46]-[.O47]*([.L46]-[.N47])" office:value-type="float" office:value="3839546.98794571" calcext:value-type="float">
            <text:p>3,839,547</text:p>
          </table:table-cell>
          <table:table-cell table:style-name="ce36" table:formula="of:=([.L47]-([.C47]+273.15)*4200)/2100000" office:value-type="float" office:value="1.09593473672516" calcext:value-type="float">
            <text:p>1.096</text:p>
          </table:table-cell>
          <table:table-cell table:style-name="ce4" table:formula="of:=IF([.Q47] &lt;= 1; ([.L47]-[.Q47]*2100000)/4200-273.15; ([.L47]-2100000)/4200-273.15)" office:value-type="float" office:value="141.027854272789" calcext:value-type="float">
            <text:p>141.03</text:p>
          </table:table-cell>
          <table:table-cell table:style-name="ce13" table:formula="of:=IF([.Q47]&lt;=0; 4200*LN(([.R47]+273.15)/273.15); IF([.Q47]&lt;1; 4200*LN(([.C47]+273.15)/273.15) + [.Q47]*(2100000/([.C47]+273.15)); 4200*LN(([.C47]+273.15)/273.15) + (2100000/([.C47]+273.15)) + 4200*LN(([.R47]+273.15)/([.C47]+273.15))))" office:value-type="float" office:value="7482.75949431764" calcext:value-type="float">
            <text:p>7483</text:p>
          </table:table-cell>
          <table:table-cell table:number-columns-repeated="16365"/>
        </table:table-row>
        <table:table-row table:style-name="ro1">
          <table:table-cell table:formula="of:=[.A$12]" office:value-type="string" office:string-value="LP Out" calcext:value-type="string">
            <text:p>LP Out</text:p>
          </table:table-cell>
          <table:table-cell table:formula="of:=[.B$40]*[.M12]" office:value-type="float" office:value="0.0030735" calcext:value-type="float">
            <text:p>0.0030735</text:p>
          </table:table-cell>
          <table:table-cell table:formula="of:=SQRT(SQRT([.B48]))*100" office:value-type="float" office:value="23.5455209833482" calcext:value-type="float">
            <text:p>23.55</text:p>
          </table:table-cell>
          <table:table-cell table:formula="of:=4200*([.C48]+273.15)" office:value-type="float" office:value="1246121.18813006" calcext:value-type="float">
            <text:p>1246121.18813006</text:p>
          </table:table-cell>
          <table:table-cell table:formula="of:=4200 * LN(([.C48] + 273.15) / 273.15)" office:value-type="float" office:value="347.278412159094" calcext:value-type="float">
            <text:p>347.278412159094</text:p>
          </table:table-cell>
          <table:table-cell table:formula="of:=[.E48] + (2100000 / ([.C48] + 273.15))" office:value-type="float" office:value="7425.24168251753" calcext:value-type="float">
            <text:p>7425.24168251753</text:p>
          </table:table-cell>
          <table:table-cell table:number-columns-repeated="4"/>
          <table:table-cell table:style-name="ce11" table:formula="of:=[.S48]" office:value-type="float" office:value="7059.23296344868" calcext:value-type="float">
            <text:p>7059</text:p>
          </table:table-cell>
          <table:table-cell table:formula="of:=[.P48]" office:value-type="float" office:value="3237528.04054148" calcext:value-type="float">
            <text:p>3,237,528</text:p>
          </table:table-cell>
          <table:table-cell table:style-name="ce43" table:formula="of:=[.R48]" office:value-type="float" office:value="23.5455209833482" calcext:value-type="float">
            <text:p>23.55</text:p>
          </table:table-cell>
          <table:table-cell table:style-name="ce15" table:formula="of:=IF([.K47] &lt;= [.E48]; 4200 * 273.15 * EXP([.K47] / 4200); IF([.K47] &gt;= [.F48]; 4200 * ([.C48]+ 273.15) * EXP(([.K47] - [.F48]) / 4200) + 2100000; [.D48] + ([.C48] + 273.15) * ([.K47] - [.E48])))" office:value-type="float" office:value="3363303.85258915" calcext:value-type="float">
            <text:p>3,363,304</text:p>
          </table:table-cell>
          <table:table-cell table:style-name="ce7" office:value-type="float" office:value="1.2641" calcext:value-type="float">
            <text:p>1.2641</text:p>
          </table:table-cell>
          <table:table-cell table:style-name="ce2" table:formula="of:=[.L47]-[.O48]*([.L47]-[.N48])" office:value-type="float" office:value="3237528.04054148" calcext:value-type="float">
            <text:p>3,237,528</text:p>
          </table:table-cell>
          <table:table-cell table:style-name="ce46" table:formula="of:=([.L48]-([.C48]+273.15)*4200)/2100000" office:value-type="float" office:value="0.948288977338771" calcext:value-type="float">
            <text:p>0.948</text:p>
          </table:table-cell>
          <table:table-cell table:style-name="ce4" table:formula="of:=IF([.Q48] &lt;= 1; ([.L48]-[.Q48]*2100000)/4200-273.15; ([.L48]-2100000)/4200-273.15)" office:value-type="float" office:value="23.5455209833482" calcext:value-type="float">
            <text:p>23.55</text:p>
          </table:table-cell>
          <table:table-cell table:style-name="ce13" table:formula="of:=IF([.Q48]&lt;=0; 4200*LN(([.R48]+273.15)/273.15); IF([.Q48]&lt;1; 4200*LN(([.C48]+273.15)/273.15) + [.Q48]*(2100000/([.C48]+273.15)); 4200*LN(([.C48]+273.15)/273.15) + (2100000/([.C48]+273.15)) + 4200*LN(([.R48]+273.15)/([.C48]+273.15))))" office:value-type="float" office:value="7059.23296344868" calcext:value-type="float">
            <text:p>7059</text:p>
          </table:table-cell>
          <table:table-cell table:number-columns-repeated="1636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1<text:span text:style-name="T1">st</text:span> Turbine Heatup Holding point with full flow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office:value-type="string" calcext:value-type="string">
            <text:p>Valve Drop</text:p>
          </table:table-cell>
          <table:table-cell table:style-name="ce21" office:value-type="percentage" office:value="0.1" calcext:value-type="percentage">
            <text:p>10 %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table:formula="of:=[.A$3]" office:value-type="string" office:string-value="Drum Out" calcext:value-type="string">
            <text:p>Drum Out</text:p>
          </table:table-cell>
          <table:table-cell table:style-name="ce16" office:value-type="float" office:value="15" calcext:value-type="float">
            <text:p>15</text:p>
          </table:table-cell>
          <table:table-cell table:formula="of:=SQRT(SQRT([.B53]))*100" office:value-type="float" office:value="196.798967126543" calcext:value-type="float">
            <text:p>196.80</text:p>
          </table:table-cell>
          <table:table-cell table:formula="of:=4200*([.C53]+273.15)" office:value-type="float" office:value="1973785.66193148" calcext:value-type="float">
            <text:p>1973785.66193148</text:p>
          </table:table-cell>
          <table:table-cell table:formula="of:=4200 * LN(([.C53] + 273.15) / 273.15)" office:value-type="float" office:value="2278.93265621808" calcext:value-type="float">
            <text:p>2278.93265621808</text:p>
          </table:table-cell>
          <table:table-cell table:formula="of:=[.E53] + (2100000 / ([.C53] + 273.15))" office:value-type="float" office:value="6747.50296256484" calcext:value-type="float">
            <text:p>6747.50296256484</text:p>
          </table:table-cell>
          <table:table-cell table:style-name="ce4" table:formula="of:=SQRT(SQRT([.B53]))*100" office:value-type="float" office:value="196.798967126543" calcext:value-type="float">
            <text:p>196.80</text:p>
          </table:table-cell>
          <table:table-cell table:formula="of:=([.G53]+273.15)*4200+2100000" office:value-type="float" office:value="4073785.66193148" calcext:value-type="float">
            <text:p>4073786</text:p>
          </table:table-cell>
          <table:table-cell table:style-name="ce7" table:formula="of:=([.H53]-([.C53]+273.15)*4200)/2100000" office:value-type="float" office:value="1" calcext:value-type="float">
            <text:p>1.0000</text:p>
          </table:table-cell>
          <table:table-cell table:formula="of:=IF([.I53]&lt;=0; 4200*LN(([.G53]+273.15)/273.15); IF([.I53]&lt;1; 4200*LN(([.C53]+273.15)/273.15) + [.I53]*(2100000/([.C53]+273.15)); 4200*LN(([.C53]+273.15)/273.15) + (2100000/([.C53]+273.15)) + 4200*LN(([.G53]+273.15)/([.C53]+273.15))))" office:value-type="float" office:value="6747.50296256484" calcext:value-type="float">
            <text:p>6748</text:p>
          </table:table-cell>
          <table:table-cell table:style-name="ce11"/>
          <table:table-cell/>
          <table:table-cell table:style-name="ce4"/>
          <table:table-cell table:style-name="ce2"/>
          <table:table-cell table:style-name="ce7"/>
          <table:table-cell table:style-name="ce2"/>
          <table:table-cell/>
          <table:table-cell table:style-name="ce4"/>
          <table:table-cell table:number-columns-repeated="16366"/>
        </table:table-row>
        <table:table-row table:style-name="ro1">
          <table:table-cell table:formula="of:=[.A$4]" office:value-type="string" office:string-value="HP In" calcext:value-type="string">
            <text:p>HP In</text:p>
          </table:table-cell>
          <table:table-cell table:style-name="ce19" table:formula="of:=[.B53]*[.B52]" office:value-type="float" office:value="1.5" calcext:value-type="float">
            <text:p>1.5</text:p>
          </table:table-cell>
          <table:table-cell table:formula="of:=SQRT(SQRT([.B54]))*100" office:value-type="float" office:value="110.668191970032" calcext:value-type="float">
            <text:p>110.67</text:p>
          </table:table-cell>
          <table:table-cell table:formula="of:=4200*([.C54]+273.15)" office:value-type="float" office:value="1612036.40627413" calcext:value-type="float">
            <text:p>1612036.40627413</text:p>
          </table:table-cell>
          <table:table-cell table:formula="of:=4200 * LN(([.C54] + 273.15) / 273.15)" office:value-type="float" office:value="1428.62112631477" calcext:value-type="float">
            <text:p>1428.62112631477</text:p>
          </table:table-cell>
          <table:table-cell table:formula="of:=[.E54] + (2100000 / ([.C54] + 273.15))" office:value-type="float" office:value="6899.96157847334" calcext:value-type="float">
            <text:p>6899.96157847334</text:p>
          </table:table-cell>
          <table:table-cell table:style-name="ce4" table:formula="of:=[.G53]" office:value-type="float" office:value="196.798967126543" calcext:value-type="float">
            <text:p>196.80</text:p>
          </table:table-cell>
          <table:table-cell table:formula="of:=([.G54]+273.15)*4200+2100000" office:value-type="float" office:value="4073785.66193148" calcext:value-type="float">
            <text:p>4073786</text:p>
          </table:table-cell>
          <table:table-cell table:style-name="ce7" table:formula="of:=([.H54]-([.C54]+273.15)*4200)/2100000" office:value-type="float" office:value="1.17226155031302" calcext:value-type="float">
            <text:p>1.1723</text:p>
          </table:table-cell>
          <table:table-cell table:formula="of:=IF([.I54]&lt;=0; 4200*LN(([.G54]+273.15)/273.15); IF([.I54]&lt;1; 4200*LN(([.C54]+273.15)/273.15) + [.I54]*(2100000/([.C54]+273.15)); 4200*LN(([.C54]+273.15)/273.15) + (2100000/([.C54]+273.15)) + 4200*LN(([.G54]+273.15)/([.C54]+273.15))))" office:value-type="float" office:value="7750.27310837665" calcext:value-type="float">
            <text:p>7750</text:p>
          </table:table-cell>
          <table:table-cell table:style-name="ce11" table:formula="of:=[.J54]" office:value-type="float" office:value="7750.27310837665" calcext:value-type="float">
            <text:p>7750</text:p>
          </table:table-cell>
          <table:table-cell table:formula="of:=[.H54]" office:value-type="float" office:value="4073785.66193148" calcext:value-type="float">
            <text:p>4,073,786</text:p>
          </table:table-cell>
          <table:table-cell table:style-name="ce43" table:formula="of:=[.G54]" office:value-type="float" office:value="196.798967126543" calcext:value-type="float">
            <text:p>196.80</text:p>
          </table:table-cell>
          <table:table-cell table:style-name="ce2"/>
          <table:table-cell table:style-name="ce7"/>
          <table:table-cell table:style-name="ce2"/>
          <table:table-cell/>
          <table:table-cell table:style-name="ce4"/>
          <table:table-cell table:number-columns-repeated="16366"/>
        </table:table-row>
        <table:table-row table:style-name="ro1">
          <table:table-cell table:formula="of:=[.A$5]" office:value-type="string" office:string-value="HP Mid" calcext:value-type="string">
            <text:p>HP Mid</text:p>
          </table:table-cell>
          <table:table-cell table:style-name="ce4" table:formula="of:=[.B$54]*[.M5]" office:value-type="float" office:value="0.242307692307692" calcext:value-type="float">
            <text:p>0.24</text:p>
          </table:table-cell>
          <table:table-cell table:formula="of:=SQRT(SQRT([.B55]))*100" office:value-type="float" office:value="70.1603586425711" calcext:value-type="float">
            <text:p>70.16</text:p>
          </table:table-cell>
          <table:table-cell table:formula="of:=4200*([.C55]+273.15)" office:value-type="float" office:value="1441903.5062988" calcext:value-type="float">
            <text:p>1441903.5062988</text:p>
          </table:table-cell>
          <table:table-cell table:formula="of:=4200 * LN(([.C55] + 273.15) / 273.15)" office:value-type="float" office:value="960.177871379142" calcext:value-type="float">
            <text:p>960.177871379142</text:p>
          </table:table-cell>
          <table:table-cell table:formula="of:=[.E55] + (2100000 / ([.C55] + 273.15))" office:value-type="float" office:value="7077.09204869461" calcext:value-type="float">
            <text:p>7077.09204869461</text:p>
          </table:table-cell>
          <table:table-cell table:number-columns-repeated="2"/>
          <table:table-cell table:style-name="ce7"/>
          <table:table-cell/>
          <table:table-cell table:style-name="ce14" table:formula="of:=[.S55]" office:value-type="float" office:value="7747.89981087987" calcext:value-type="float">
            <text:p>7748</text:p>
          </table:table-cell>
          <table:table-cell table:formula="of:=[.P55]" office:value-type="float" office:value="3791609.18082216" calcext:value-type="float">
            <text:p>3,791,609</text:p>
          </table:table-cell>
          <table:table-cell table:style-name="ce43" table:formula="of:=[.R55]" office:value-type="float" office:value="129.614090671942" calcext:value-type="float">
            <text:p>129.61</text:p>
          </table:table-cell>
          <table:table-cell table:style-name="ce15" table:formula="of:=IF([.K54] &lt;= [.E55]; 4200 * 273.15 * EXP([.K54] / 4200); IF([.K54] &gt;= [.F55]; 4200 * ([.C55]+ 273.15) * EXP(([.K54] - [.F55]) / 4200) + 2100000; [.D55] + ([.C55] + 273.15) * ([.K54] - [.E55])))" office:value-type="float" office:value="3792565.32995089" calcext:value-type="float">
            <text:p>3,792,565</text:p>
          </table:table-cell>
          <table:table-cell table:style-name="ce7" office:value-type="float" office:value="1.0034" calcext:value-type="float">
            <text:p>1.0034</text:p>
          </table:table-cell>
          <table:table-cell table:style-name="ce2" table:formula="of:=[.L54]-[.O55]*([.L54]-[.N55])" office:value-type="float" office:value="3791609.18082216" calcext:value-type="float">
            <text:p>3,791,609</text:p>
          </table:table-cell>
          <table:table-cell table:style-name="ce36" table:formula="of:=([.L55]-([.C55]+273.15)*4200)/2100000" office:value-type="float" office:value="1.11890746405874" calcext:value-type="float">
            <text:p>1.119</text:p>
          </table:table-cell>
          <table:table-cell table:style-name="ce4" table:formula="of:=IF([.Q55] &lt;= 1; ([.L55]-[.Q55]*2100000)/4200-273.15; ([.L55]-2100000)/4200-273.15)" office:value-type="float" office:value="129.614090671942" calcext:value-type="float">
            <text:p>129.61</text:p>
          </table:table-cell>
          <table:table-cell table:style-name="ce13" table:formula="of:=IF([.Q55]&lt;=0; 4200*LN(([.R55]+273.15)/273.15); IF([.Q55]&lt;1; 4200*LN(([.C55]+273.15)/273.15) + [.Q55]*(2100000/([.C55]+273.15)); 4200*LN(([.C55]+273.15)/273.15) + (2100000/([.C55]+273.15)) + 4200*LN(([.R55]+273.15)/([.C55]+273.15))))" office:value-type="float" office:value="7747.89981087987" calcext:value-type="float">
            <text:p>7748</text:p>
          </table:table-cell>
          <table:table-cell table:number-columns-repeated="16365"/>
        </table:table-row>
        <table:table-row table:style-name="ro1">
          <table:table-cell table:formula="of:=[.A$6]" office:value-type="string" office:string-value="HP Out" calcext:value-type="string">
            <text:p>HP Out</text:p>
          </table:table-cell>
          <table:table-cell table:style-name="ce4" table:formula="of:=[.B$54]*[.M6]" office:value-type="float" office:value="0.0807692307692308" calcext:value-type="float">
            <text:p>0.08</text:p>
          </table:table-cell>
          <table:table-cell table:formula="of:=SQRT(SQRT([.B56]))*100" office:value-type="float" office:value="53.3103442147396" calcext:value-type="float">
            <text:p>53.31</text:p>
          </table:table-cell>
          <table:table-cell table:formula="of:=4200*([.C56]+273.15)" office:value-type="float" office:value="1371133.44570191" calcext:value-type="float">
            <text:p>1371133.44570191</text:p>
          </table:table-cell>
          <table:table-cell table:formula="of:=4200 * LN(([.C56] + 273.15) / 273.15)" office:value-type="float" office:value="748.807034930881" calcext:value-type="float">
            <text:p>748.807034930881</text:p>
          </table:table-cell>
          <table:table-cell table:formula="of:=[.E56] + (2100000 / ([.C56] + 273.15))" office:value-type="float" office:value="7181.44131108253" calcext:value-type="float">
            <text:p>7181.44131108253</text:p>
          </table:table-cell>
          <table:table-cell table:number-columns-repeated="2"/>
          <table:table-cell table:style-name="ce7"/>
          <table:table-cell/>
          <table:table-cell table:style-name="ce11" table:formula="of:=[.S56]" office:value-type="float" office:value="7266.33833457344" calcext:value-type="float">
            <text:p>7266</text:p>
          </table:table-cell>
          <table:table-cell table:formula="of:=[.P56]" office:value-type="float" office:value="3499130.96897732" calcext:value-type="float">
            <text:p>3,499,131</text:p>
          </table:table-cell>
          <table:table-cell table:style-name="ce43" table:formula="of:=[.R56]" office:value-type="float" office:value="59.9764211850771" calcext:value-type="float">
            <text:p>59.98</text:p>
          </table:table-cell>
          <table:table-cell table:style-name="ce15" table:formula="of:=IF([.K55] &lt;= [.E56]; 4200 * 273.15 * EXP([.K55] / 4200); IF([.K55] &gt;= [.F56]; 4200 * ([.C56]+ 273.15) * EXP(([.K55] - [.F56]) / 4200) + 2100000; [.D56] + ([.C56] + 273.15) * ([.K55] - [.E56])))" office:value-type="float" office:value="3669110.34858693" calcext:value-type="float">
            <text:p>3,669,110</text:p>
          </table:table-cell>
          <table:table-cell table:style-name="ce7" office:value-type="float" office:value="2.3876" calcext:value-type="float">
            <text:p>2.3876</text:p>
          </table:table-cell>
          <table:table-cell table:style-name="ce2" table:formula="of:=[.L55]-[.O56]*([.L55]-[.N56])" office:value-type="float" office:value="3499130.96897732" calcext:value-type="float">
            <text:p>3,499,131</text:p>
          </table:table-cell>
          <table:table-cell table:style-name="ce46" table:formula="of:=([.L56]-([.C56]+273.15)*4200)/2100000" office:value-type="float" office:value="1.01333215394068" calcext:value-type="float">
            <text:p>1.013</text:p>
          </table:table-cell>
          <table:table-cell table:style-name="ce4" table:formula="of:=IF([.Q56] &lt;= 1; ([.L56]-[.Q56]*2100000)/4200-273.15; ([.L56]-2100000)/4200-273.15)" office:value-type="float" office:value="59.9764211850771" calcext:value-type="float">
            <text:p>59.98</text:p>
          </table:table-cell>
          <table:table-cell table:style-name="ce13" table:formula="of:=IF([.Q56]&lt;=0; 4200*LN(([.R56]+273.15)/273.15); IF([.Q56]&lt;1; 4200*LN(([.C56]+273.15)/273.15) + [.Q56]*(2100000/([.C56]+273.15)); 4200*LN(([.C56]+273.15)/273.15) + (2100000/([.C56]+273.15)) + 4200*LN(([.R56]+273.15)/([.C56]+273.15))))" office:value-type="float" office:value="7266.33833457344" calcext:value-type="float">
            <text:p>7266</text:p>
          </table:table-cell>
          <table:table-cell table:number-columns-repeated="16365"/>
        </table:table-row>
        <table:table-row table:style-name="ro1">
          <table:table-cell table:formula="of:=[.A$7]" office:value-type="string" office:string-value="LP In" calcext:value-type="string">
            <text:p>LP In</text:p>
          </table:table-cell>
          <table:table-cell table:style-name="ce4" table:formula="of:=[.B$54]*[.M7]" office:value-type="float" office:value="0.0807692307692308" calcext:value-type="float">
            <text:p>0.08</text:p>
          </table:table-cell>
          <table:table-cell table:formula="of:=SQRT(SQRT([.B57]))*100" office:value-type="float" office:value="53.3103442147396" calcext:value-type="float">
            <text:p>53.31</text:p>
          </table:table-cell>
          <table:table-cell table:formula="of:=4200*([.C57]+273.15)" office:value-type="float" office:value="1371133.44570191" calcext:value-type="float">
            <text:p>1371133.44570191</text:p>
          </table:table-cell>
          <table:table-cell table:formula="of:=4200 * LN(([.C57] + 273.15) / 273.15)" office:value-type="float" office:value="748.807034930881" calcext:value-type="float">
            <text:p>748.807034930881</text:p>
          </table:table-cell>
          <table:table-cell table:formula="of:=[.E57] + (2100000 / ([.C57] + 273.15))" office:value-type="float" office:value="7181.44131108253" calcext:value-type="float">
            <text:p>7181.44131108253</text:p>
          </table:table-cell>
          <table:table-cell table:style-name="ce34" table:formula="of:=[.M56]" office:value-type="float" office:value="59.9764211850771" calcext:value-type="float">
            <text:p>59.98</text:p>
          </table:table-cell>
          <table:table-cell table:formula="of:=([.G57]+273.15)*4200+2100000" office:value-type="float" office:value="3499130.96897732" calcext:value-type="float">
            <text:p>3499131</text:p>
          </table:table-cell>
          <table:table-cell table:style-name="ce7" table:formula="of:=([.H57]-([.C57]+273.15)*4200)/2100000" office:value-type="float" office:value="1.01333215394068" calcext:value-type="float">
            <text:p>1.0133</text:p>
          </table:table-cell>
          <table:table-cell table:formula="of:=IF([.I57]&lt;=0; 4200*LN(([.G57]+273.15)/273.15); IF([.I57]&lt;1; 4200*LN(([.C57]+273.15)/273.15) + [.I57]*(2100000/([.C57]+273.15)); 4200*LN(([.C57]+273.15)/273.15) + (2100000/([.C57]+273.15)) + 4200*LN(([.G57]+273.15)/([.C57]+273.15))))" office:value-type="float" office:value="7266.33833457344" calcext:value-type="float">
            <text:p>7266</text:p>
          </table:table-cell>
          <table:table-cell table:style-name="ce11" table:formula="of:=[.J57]" office:value-type="float" office:value="7266.33833457344" calcext:value-type="float">
            <text:p>7266</text:p>
          </table:table-cell>
          <table:table-cell table:formula="of:=[.H57]" office:value-type="float" office:value="3499130.96897732" calcext:value-type="float">
            <text:p>3,499,131</text:p>
          </table:table-cell>
          <table:table-cell table:style-name="ce43" table:formula="of:=[.G57]" office:value-type="float" office:value="59.9764211850771" calcext:value-type="float">
            <text:p>59.98</text:p>
          </table:table-cell>
          <table:table-cell/>
          <table:table-cell table:style-name="ce7"/>
          <table:table-cell/>
          <table:table-cell table:style-name="ce36"/>
          <table:table-cell table:style-name="ce4"/>
          <table:table-cell table:style-name="ce13"/>
          <table:table-cell table:number-columns-repeated="16365"/>
        </table:table-row>
        <table:table-row table:style-name="ro1">
          <table:table-cell table:formula="of:=[.A$8]" office:value-type="string" office:string-value="LP Tap 1" calcext:value-type="string">
            <text:p>LP Tap 1</text:p>
          </table:table-cell>
          <table:table-cell table:style-name="ce4" table:formula="of:=[.B$54]*[.M8]" office:value-type="float" office:value="0.0692307692307692" calcext:value-type="float">
            <text:p>0.07</text:p>
          </table:table-cell>
          <table:table-cell table:formula="of:=SQRT(SQRT([.B58]))*100" office:value-type="float" office:value="51.2949710782752" calcext:value-type="float">
            <text:p>51.29</text:p>
          </table:table-cell>
          <table:table-cell table:formula="of:=4200*([.C58]+273.15)" office:value-type="float" office:value="1362668.87852876" calcext:value-type="float">
            <text:p>1362668.87852876</text:p>
          </table:table-cell>
          <table:table-cell table:formula="of:=4200 * LN(([.C58] + 273.15) / 273.15)" office:value-type="float" office:value="722.79835433202" calcext:value-type="float">
            <text:p>722.79835433202</text:p>
          </table:table-cell>
          <table:table-cell table:formula="of:=[.E58] + (2100000 / ([.C58] + 273.15))" office:value-type="float" office:value="7195.39058783394" calcext:value-type="float">
            <text:p>7195.39058783394</text:p>
          </table:table-cell>
          <table:table-cell table:number-columns-repeated="4"/>
          <table:table-cell table:style-name="ce11" table:formula="of:=[.S58]" office:value-type="float" office:value="7164.92886992462" calcext:value-type="float">
            <text:p>7165</text:p>
          </table:table-cell>
          <table:table-cell table:formula="of:=[.P58]" office:value-type="float" office:value="3452785.72734267" calcext:value-type="float">
            <text:p>3,452,786</text:p>
          </table:table-cell>
          <table:table-cell table:style-name="ce43" table:formula="of:=[.R58]" office:value-type="float" office:value="51.2949710782752" calcext:value-type="float">
            <text:p>51.29</text:p>
          </table:table-cell>
          <table:table-cell table:style-name="ce15" table:formula="of:=IF([.K57] &lt;= [.E58]; 4200 * 273.15 * EXP([.K57] / 4200); IF([.K57] &gt;= [.F58]; 4200 * ([.C58]+ 273.15) * EXP(([.K57] - [.F58]) / 4200) + 2100000; [.D58] + ([.C58] + 273.15) * ([.K57] - [.E58])))" office:value-type="float" office:value="3485883.03665744" calcext:value-type="float">
            <text:p>3,485,883</text:p>
          </table:table-cell>
          <table:table-cell table:style-name="ce7" office:value-type="float" office:value="3.4983" calcext:value-type="float">
            <text:p>3.4983</text:p>
          </table:table-cell>
          <table:table-cell table:style-name="ce2" table:formula="of:=[.L57]-[.O58]*([.L57]-[.N58])" office:value-type="float" office:value="3452785.72734267" calcext:value-type="float">
            <text:p>3,452,786</text:p>
          </table:table-cell>
          <table:table-cell table:style-name="ce36" table:formula="of:=([.L58]-([.C58]+273.15)*4200)/2100000" office:value-type="float" office:value="0.995293737530436" calcext:value-type="float">
            <text:p>0.995</text:p>
          </table:table-cell>
          <table:table-cell table:style-name="ce4" table:formula="of:=IF([.Q58] &lt;= 1; ([.L58]-[.Q58]*2100000)/4200-273.15; ([.L58]-2100000)/4200-273.15)" office:value-type="float" office:value="51.2949710782752" calcext:value-type="float">
            <text:p>51.29</text:p>
          </table:table-cell>
          <table:table-cell table:style-name="ce13" table:formula="of:=IF([.Q58]&lt;=0; 4200*LN(([.R58]+273.15)/273.15); IF([.Q58]&lt;1; 4200*LN(([.C58]+273.15)/273.15) + [.Q58]*(2100000/([.C58]+273.15)); 4200*LN(([.C58]+273.15)/273.15) + (2100000/([.C58]+273.15)) + 4200*LN(([.R58]+273.15)/([.C58]+273.15))))" office:value-type="float" office:value="7164.92886992462" calcext:value-type="float">
            <text:p>7165</text:p>
          </table:table-cell>
          <table:table-cell table:number-columns-repeated="16365"/>
        </table:table-row>
        <table:table-row table:style-name="ro1">
          <table:table-cell table:formula="of:=[.A$9]" office:value-type="string" office:string-value="LP Tap 2" calcext:value-type="string">
            <text:p>LP Tap 2</text:p>
          </table:table-cell>
          <table:table-cell table:style-name="ce4" table:formula="of:=[.B$54]*[.M9]" office:value-type="float" office:value="0.0576923076923077" calcext:value-type="float">
            <text:p>0.06</text:p>
          </table:table-cell>
          <table:table-cell table:formula="of:=SQRT(SQRT([.B59]))*100" office:value-type="float" office:value="49.0094103930695" calcext:value-type="float">
            <text:p>49.01</text:p>
          </table:table-cell>
          <table:table-cell table:formula="of:=4200*([.C59]+273.15)" office:value-type="float" office:value="1353069.52365089" calcext:value-type="float">
            <text:p>1353069.52365089</text:p>
          </table:table-cell>
          <table:table-cell table:formula="of:=4200 * LN(([.C59] + 273.15) / 273.15)" office:value-type="float" office:value="693.106644433449" calcext:value-type="float">
            <text:p>693.106644433449</text:p>
          </table:table-cell>
          <table:table-cell table:formula="of:=[.E59] + (2100000 / ([.C59] + 273.15))" office:value-type="float" office:value="7211.61869856768" calcext:value-type="float">
            <text:p>7211.61869856768</text:p>
          </table:table-cell>
          <table:table-cell table:number-columns-repeated="4"/>
          <table:table-cell table:style-name="ce11" table:formula="of:=[.S59]" office:value-type="float" office:value="7040.08584815782" calcext:value-type="float">
            <text:p>7040</text:p>
          </table:table-cell>
          <table:table-cell table:formula="of:=[.P59]" office:value-type="float" office:value="3397808.60169981" calcext:value-type="float">
            <text:p>3,397,809</text:p>
          </table:table-cell>
          <table:table-cell table:style-name="ce43" table:formula="of:=[.R59]" office:value-type="float" office:value="49.0094103930695" calcext:value-type="float">
            <text:p>49.01</text:p>
          </table:table-cell>
          <table:table-cell table:style-name="ce15" table:formula="of:=IF([.K58] &lt;= [.E59]; 4200 * 273.15 * EXP([.K58] / 4200); IF([.K58] &gt;= [.F59]; 4200 * ([.C59]+ 273.15) * EXP(([.K58] - [.F59]) / 4200) + 2100000; [.D59] + ([.C59] + 273.15) * ([.K58] - [.E59])))" office:value-type="float" office:value="3438027.95598389" calcext:value-type="float">
            <text:p>3,438,028</text:p>
          </table:table-cell>
          <table:table-cell table:style-name="ce7" office:value-type="float" office:value="3.7253" calcext:value-type="float">
            <text:p>3.7253</text:p>
          </table:table-cell>
          <table:table-cell table:style-name="ce2" table:formula="of:=[.L58]-[.O59]*([.L58]-[.N59])" office:value-type="float" office:value="3397808.60169981" calcext:value-type="float">
            <text:p>3,397,809</text:p>
          </table:table-cell>
          <table:table-cell table:style-name="ce36" table:formula="of:=([.L59]-([.C59]+273.15)*4200)/2100000" office:value-type="float" office:value="0.973685275261389" calcext:value-type="float">
            <text:p>0.974</text:p>
          </table:table-cell>
          <table:table-cell table:style-name="ce4" table:formula="of:=IF([.Q59] &lt;= 1; ([.L59]-[.Q59]*2100000)/4200-273.15; ([.L59]-2100000)/4200-273.15)" office:value-type="float" office:value="49.0094103930695" calcext:value-type="float">
            <text:p>49.01</text:p>
          </table:table-cell>
          <table:table-cell table:style-name="ce13" table:formula="of:=IF([.Q59]&lt;=0; 4200*LN(([.R59]+273.15)/273.15); IF([.Q59]&lt;1; 4200*LN(([.C59]+273.15)/273.15) + [.Q59]*(2100000/([.C59]+273.15)); 4200*LN(([.C59]+273.15)/273.15) + (2100000/([.C59]+273.15)) + 4200*LN(([.R59]+273.15)/([.C59]+273.15))))" office:value-type="float" office:value="7040.08584815782" calcext:value-type="float">
            <text:p>7040</text:p>
          </table:table-cell>
          <table:table-cell table:number-columns-repeated="16365"/>
        </table:table-row>
        <table:table-row table:style-name="ro1">
          <table:table-cell table:formula="of:=[.A$10]" office:value-type="string" office:string-value="LP Tap 3" calcext:value-type="string">
            <text:p>LP Tap 3</text:p>
          </table:table-cell>
          <table:table-cell table:style-name="ce4" table:formula="of:=[.B$54]*[.M10]" office:value-type="float" office:value="0.0461538461538462" calcext:value-type="float">
            <text:p>0.05</text:p>
          </table:table-cell>
          <table:table-cell table:formula="of:=SQRT(SQRT([.B60]))*100" office:value-type="float" office:value="46.3502386414385" calcext:value-type="float">
            <text:p>46.35</text:p>
          </table:table-cell>
          <table:table-cell table:formula="of:=4200*([.C60]+273.15)" office:value-type="float" office:value="1341901.00229404" calcext:value-type="float">
            <text:p>1341901.00229404</text:p>
          </table:table-cell>
          <table:table-cell table:formula="of:=4200 * LN(([.C60] + 273.15) / 273.15)" office:value-type="float" office:value="658.295088768006" calcext:value-type="float">
            <text:p>658.295088768006</text:p>
          </table:table-cell>
          <table:table-cell table:formula="of:=[.E60] + (2100000 / ([.C60] + 273.15))" office:value-type="float" office:value="7231.06013247973" calcext:value-type="float">
            <text:p>7231.06013247973</text:p>
          </table:table-cell>
          <table:table-cell table:number-columns-repeated="4"/>
          <table:table-cell table:style-name="ce11" table:formula="of:=[.S60]" office:value-type="float" office:value="6916.63925454951" calcext:value-type="float">
            <text:p>6917</text:p>
          </table:table-cell>
          <table:table-cell table:formula="of:=[.P60]" office:value-type="float" office:value="3341443.45676149" calcext:value-type="float">
            <text:p>3,341,443</text:p>
          </table:table-cell>
          <table:table-cell table:style-name="ce43" table:formula="of:=[.R60]" office:value-type="float" office:value="46.3502386414385" calcext:value-type="float">
            <text:p>46.35</text:p>
          </table:table-cell>
          <table:table-cell table:style-name="ce15" table:formula="of:=IF([.K59] &lt;= [.E60]; 4200 * 273.15 * EXP([.K59] / 4200); IF([.K59] &gt;= [.F60]; 4200 * ([.C60]+ 273.15) * EXP(([.K59] - [.F60]) / 4200) + 2100000; [.D60] + ([.C60] + 273.15) * ([.K59] - [.E60])))" office:value-type="float" office:value="3380884.67287881" calcext:value-type="float">
            <text:p>3,380,885</text:p>
          </table:table-cell>
          <table:table-cell table:style-name="ce7" office:value-type="float" office:value="3.3305" calcext:value-type="float">
            <text:p>3.3305</text:p>
          </table:table-cell>
          <table:table-cell table:style-name="ce2" table:formula="of:=[.L59]-[.O60]*([.L59]-[.N60])" office:value-type="float" office:value="3341443.45676149" calcext:value-type="float">
            <text:p>3,341,443</text:p>
          </table:table-cell>
          <table:table-cell table:style-name="ce36" table:formula="of:=([.L60]-([.C60]+273.15)*4200)/2100000" office:value-type="float" office:value="0.952163073555925" calcext:value-type="float">
            <text:p>0.952</text:p>
          </table:table-cell>
          <table:table-cell table:style-name="ce4" table:formula="of:=IF([.Q60] &lt;= 1; ([.L60]-[.Q60]*2100000)/4200-273.15; ([.L60]-2100000)/4200-273.15)" office:value-type="float" office:value="46.3502386414385" calcext:value-type="float">
            <text:p>46.35</text:p>
          </table:table-cell>
          <table:table-cell table:style-name="ce13" table:formula="of:=IF([.Q60]&lt;=0; 4200*LN(([.R60]+273.15)/273.15); IF([.Q60]&lt;1; 4200*LN(([.C60]+273.15)/273.15) + [.Q60]*(2100000/([.C60]+273.15)); 4200*LN(([.C60]+273.15)/273.15) + (2100000/([.C60]+273.15)) + 4200*LN(([.R60]+273.15)/([.C60]+273.15))))" office:value-type="float" office:value="6916.63925454951" calcext:value-type="float">
            <text:p>6917</text:p>
          </table:table-cell>
          <table:table-cell table:number-columns-repeated="16365"/>
        </table:table-row>
        <table:table-row table:style-name="ro1">
          <table:table-cell table:formula="of:=[.A$11]" office:value-type="string" office:string-value="LP Tap 4" calcext:value-type="string">
            <text:p>LP Tap 4</text:p>
          </table:table-cell>
          <table:table-cell table:style-name="ce4" table:formula="of:=[.B$54]*[.M11]" office:value-type="float" office:value="0.0346153846153846" calcext:value-type="float">
            <text:p>0.03</text:p>
          </table:table-cell>
          <table:table-cell table:formula="of:=SQRT(SQRT([.B61]))*100" office:value-type="float" office:value="43.1337573002646" calcext:value-type="float">
            <text:p>43.13</text:p>
          </table:table-cell>
          <table:table-cell table:formula="of:=4200*([.C61]+273.15)" office:value-type="float" office:value="1328391.78066111" calcext:value-type="float">
            <text:p>1328391.78066111</text:p>
          </table:table-cell>
          <table:table-cell table:formula="of:=4200 * LN(([.C61] + 273.15) / 273.15)" office:value-type="float" office:value="615.798464210423" calcext:value-type="float">
            <text:p>615.798464210423</text:p>
          </table:table-cell>
          <table:table-cell table:formula="of:=[.E61] + (2100000 / ([.C61] + 273.15))" office:value-type="float" office:value="7255.40594176534" calcext:value-type="float">
            <text:p>7255.40594176534</text:p>
          </table:table-cell>
          <table:table-cell table:number-columns-repeated="4"/>
          <table:table-cell table:style-name="ce11" table:formula="of:=[.S61]" office:value-type="float" office:value="6803.07591431816" calcext:value-type="float">
            <text:p>6803</text:p>
          </table:table-cell>
          <table:table-cell table:formula="of:=[.P61]" office:value-type="float" office:value="3285327.14004039" calcext:value-type="float">
            <text:p>3,285,327</text:p>
          </table:table-cell>
          <table:table-cell table:style-name="ce43" table:formula="of:=[.R61]" office:value-type="float" office:value="43.1337573002646" calcext:value-type="float">
            <text:p>43.13</text:p>
          </table:table-cell>
          <table:table-cell table:style-name="ce15" table:formula="of:=IF([.K60] &lt;= [.E61]; 4200 * 273.15 * EXP([.K60] / 4200); IF([.K60] &gt;= [.F61]; 4200 * ([.C61]+ 273.15) * EXP(([.K60] - [.F61]) / 4200) + 2100000; [.D61] + ([.C61] + 273.15) * ([.K60] - [.E61])))" office:value-type="float" office:value="3321245.37998032" calcext:value-type="float">
            <text:p>3,321,245</text:p>
          </table:table-cell>
          <table:table-cell table:style-name="ce7" office:value-type="float" office:value="2.7783" calcext:value-type="float">
            <text:p>2.7783</text:p>
          </table:table-cell>
          <table:table-cell table:style-name="ce2" table:formula="of:=[.L60]-[.O61]*([.L60]-[.N61])" office:value-type="float" office:value="3285327.14004039" calcext:value-type="float">
            <text:p>3,285,327</text:p>
          </table:table-cell>
          <table:table-cell table:style-name="ce36" table:formula="of:=([.L61]-([.C61]+273.15)*4200)/2100000" office:value-type="float" office:value="0.931873980656798" calcext:value-type="float">
            <text:p>0.932</text:p>
          </table:table-cell>
          <table:table-cell table:style-name="ce4" table:formula="of:=IF([.Q61] &lt;= 1; ([.L61]-[.Q61]*2100000)/4200-273.15; ([.L61]-2100000)/4200-273.15)" office:value-type="float" office:value="43.1337573002646" calcext:value-type="float">
            <text:p>43.13</text:p>
          </table:table-cell>
          <table:table-cell table:style-name="ce13" table:formula="of:=IF([.Q61]&lt;=0; 4200*LN(([.R61]+273.15)/273.15); IF([.Q61]&lt;1; 4200*LN(([.C61]+273.15)/273.15) + [.Q61]*(2100000/([.C61]+273.15)); 4200*LN(([.C61]+273.15)/273.15) + (2100000/([.C61]+273.15)) + 4200*LN(([.R61]+273.15)/([.C61]+273.15))))" office:value-type="float" office:value="6803.07591431816" calcext:value-type="float">
            <text:p>6803</text:p>
          </table:table-cell>
          <table:table-cell table:number-columns-repeated="16365"/>
        </table:table-row>
        <table:table-row table:style-name="ro1">
          <table:table-cell table:formula="of:=[.A$12]" office:value-type="string" office:string-value="LP Out" calcext:value-type="string">
            <text:p>LP Out</text:p>
          </table:table-cell>
          <table:table-cell table:style-name="ce4" table:formula="of:=[.B$54]*[.M12]" office:value-type="float" office:value="0.000141853846153846" calcext:value-type="float">
            <text:p>0.00</text:p>
          </table:table-cell>
          <table:table-cell table:formula="of:=SQRT(SQRT([.B62]))*100" office:value-type="float" office:value="10.9134051651519" calcext:value-type="float">
            <text:p>10.91</text:p>
          </table:table-cell>
          <table:table-cell table:formula="of:=4200*([.C62]+273.15)" office:value-type="float" office:value="1193066.30169364" calcext:value-type="float">
            <text:p>1193066.30169364</text:p>
          </table:table-cell>
          <table:table-cell table:formula="of:=4200 * LN(([.C62] + 273.15) / 273.15)" office:value-type="float" office:value="164.540779304912" calcext:value-type="float">
            <text:p>164.540779304912</text:p>
          </table:table-cell>
          <table:table-cell table:formula="of:=[.E62] + (2100000 / ([.C62] + 273.15))" office:value-type="float" office:value="7557.25649634379" calcext:value-type="float">
            <text:p>7557.25649634379</text:p>
          </table:table-cell>
          <table:table-cell table:number-columns-repeated="4"/>
          <table:table-cell table:style-name="ce11" table:formula="of:=[.S62]" office:value-type="float" office:value="6611.09209153269" calcext:value-type="float">
            <text:p>6611</text:p>
          </table:table-cell>
          <table:table-cell table:formula="of:=[.P62]" office:value-type="float" office:value="3024295.61901694" calcext:value-type="float">
            <text:p>3,024,296</text:p>
          </table:table-cell>
          <table:table-cell table:style-name="ce43" table:formula="of:=[.R62]" office:value-type="float" office:value="10.9134051651519" calcext:value-type="float">
            <text:p>10.91</text:p>
          </table:table-cell>
          <table:table-cell table:style-name="ce15" table:formula="of:=IF([.K61] &lt;= [.E62]; 4200 * 273.15 * EXP([.K61] / 4200); IF([.K61] &gt;= [.F62]; 4200 * ([.C62]+ 273.15) * EXP(([.K61] - [.F62]) / 4200) + 2100000; [.D62] + ([.C62] + 273.15) * ([.K61] - [.E62])))" office:value-type="float" office:value="3078831.197454" calcext:value-type="float">
            <text:p>3,078,831</text:p>
          </table:table-cell>
          <table:table-cell table:style-name="ce7" office:value-type="float" office:value="1.2641" calcext:value-type="float">
            <text:p>1.2641</text:p>
          </table:table-cell>
          <table:table-cell table:style-name="ce2" table:formula="of:=[.L61]-[.O62]*([.L61]-[.N62])" office:value-type="float" office:value="3024295.61901694" calcext:value-type="float">
            <text:p>3,024,296</text:p>
          </table:table-cell>
          <table:table-cell table:style-name="ce46" table:formula="of:=([.L62]-([.C62]+273.15)*4200)/2100000" office:value-type="float" office:value="0.872013960630143" calcext:value-type="float">
            <text:p>0.872</text:p>
          </table:table-cell>
          <table:table-cell table:style-name="ce4" table:formula="of:=IF([.Q62] &lt;= 1; ([.L62]-[.Q62]*2100000)/4200-273.15; ([.L62]-2100000)/4200-273.15)" office:value-type="float" office:value="10.9134051651519" calcext:value-type="float">
            <text:p>10.91</text:p>
          </table:table-cell>
          <table:table-cell table:style-name="ce13" table:formula="of:=IF([.Q62]&lt;=0; 4200*LN(([.R62]+273.15)/273.15); IF([.Q62]&lt;1; 4200*LN(([.C62]+273.15)/273.15) + [.Q62]*(2100000/([.C62]+273.15)); 4200*LN(([.C62]+273.15)/273.15) + (2100000/([.C62]+273.15)) + 4200*LN(([.R62]+273.15)/([.C62]+273.15))))" office:value-type="float" office:value="6611.09209153269" calcext:value-type="float">
            <text:p>6611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percentage-style style:name="N131">
      <number:number number:decimal-places="0" number:min-decimal-places="0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22:04:25.7458523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20:53:20.619145021</meta:creation-date>
    <dc:date>2026-05-07T22:05:27.049581967</dc:date>
    <meta:editing-duration>PT2H5M4S</meta:editing-duration>
    <meta:editing-cycles>17</meta:editing-cycles>
    <meta:generator>LibreOffice/25.2.3.2$Linux_X86_64 LibreOffice_project/520$Build-2</meta:generator>
    <meta:document-statistic meta:table-count="1" meta:cell-count="579" meta:object-count="0"/>
  </office:meta>
</office:document-meta>
</file>